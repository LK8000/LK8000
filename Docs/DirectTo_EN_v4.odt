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C0000013F0AF23863.png" manifest:media-type="image/png"/>
  <manifest:file-entry manifest:full-path="Pictures/10000001000001CC0000013FDCC979AE.png" manifest:media-type="image/png"/>
  <manifest:file-entry manifest:full-path="Pictures/1000000100000154000000EC053F792C.png" manifest:media-type="image/png"/>
  <manifest:file-entry manifest:full-path="Pictures/1000000100000154000000EC75E110A4.png" manifest:media-type="image/png"/>
  <manifest:file-entry manifest:full-path="Pictures/1000000100000154000000EC135CAA1B.png" manifest:media-type="image/png"/>
  <manifest:file-entry manifest:full-path="Pictures/1000000100000154000000EC7FF9D569.png" manifest:media-type="image/png"/>
  <manifest:file-entry manifest:full-path="Pictures/10000001000003260000022D8CDDB664.png" manifest:media-type="image/png"/>
  <manifest:file-entry manifest:full-path="Pictures/10000001000001CC0000013FBB78BD28.png" manifest:media-type="image/png"/>
  <manifest:file-entry manifest:full-path="Pictures/10000001000001CC0000013FA9D13626.png" manifest:media-type="image/png"/>
  <manifest:file-entry manifest:full-path="Pictures/1000000100000154000000ECF03FEA26.png" manifest:media-type="image/png"/>
  <manifest:file-entry manifest:full-path="Pictures/10000001000003260000022D821E3D37.png" manifest:media-type="image/png"/>
  <manifest:file-entry manifest:full-path="Pictures/10000001000001CC0000013FE8CDC3D8.png" manifest:media-type="image/png"/>
  <manifest:file-entry manifest:full-path="Pictures/1000000100000154000000ECBD925DFB.png" manifest:media-type="image/png"/>
  <manifest:file-entry manifest:full-path="Pictures/10000001000003260000022D9D199BE9.png" manifest:media-type="image/png"/>
  <manifest:file-entry manifest:full-path="Pictures/10000001000003260000022DF457D93D.png" manifest:media-type="image/png"/>
  <manifest:file-entry manifest:full-path="Pictures/10000001000003260000022DC5757E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mily-generic="roman" style:font-pitch="variable"/>
    <style:font-face style:name="Arial1" svg:font-family="Arial, sans-serif"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ella1" style:family="table">
      <style:table-properties style:width="14.986cm" fo:margin-left="0cm" fo:margin-top="0cm" fo:margin-bottom="0cm" table:align="left" style:writing-mode="page"/>
    </style:style>
    <style:style style:name="Tabella1.A" style:family="table-column">
      <style:table-column-properties style:column-width="7.377cm"/>
    </style:style>
    <style:style style:name="Tabella1.B" style:family="table-column">
      <style:table-column-properties style:column-width="7.608cm"/>
    </style:style>
    <style:style style:name="Tabella1.1" style:family="table-row">
      <style:table-row-properties fo:keep-together="auto"/>
    </style:style>
    <style:style style:name="Tabella1.A1" style:family="table-cell">
      <style:table-cell-properties style:vertical-align="middle" fo:padding="0cm" fo:border="none"/>
    </style:style>
    <style:style style:name="Tabella2" style:family="table">
      <style:table-properties style:width="14.986cm" fo:margin-left="0cm" fo:margin-top="0cm" fo:margin-bottom="0cm" table:align="left" style:writing-mode="page"/>
    </style:style>
    <style:style style:name="Tabella2.A" style:family="table-column">
      <style:table-column-properties style:column-width="7.377cm"/>
    </style:style>
    <style:style style:name="Tabella2.B" style:family="table-column">
      <style:table-column-properties style:column-width="7.608cm"/>
    </style:style>
    <style:style style:name="Tabella2.1" style:family="table-row">
      <style:table-row-properties fo:keep-together="auto"/>
    </style:style>
    <style:style style:name="Tabella2.A1" style:family="table-cell">
      <style:table-cell-properties style:vertical-align="middle" fo:padding="0cm" fo:border="none"/>
    </style:style>
    <style:style style:name="Tabella3" style:family="table">
      <style:table-properties style:width="14.986cm" fo:margin-left="0cm" fo:margin-top="0cm" fo:margin-bottom="0cm" table:align="left" style:writing-mode="page"/>
    </style:style>
    <style:style style:name="Tabella3.A" style:family="table-column">
      <style:table-column-properties style:column-width="7.377cm"/>
    </style:style>
    <style:style style:name="Tabella3.B" style:family="table-column">
      <style:table-column-properties style:column-width="7.608cm"/>
    </style:style>
    <style:style style:name="Tabella3.1" style:family="table-row">
      <style:table-row-properties fo:keep-together="auto"/>
    </style:style>
    <style:style style:name="Tabella3.A1" style:family="table-cell">
      <style:table-cell-properties style:vertical-align="middle" fo:padding="0cm" fo:border="none"/>
    </style:style>
    <style:style style:name="P1" style:family="paragraph" style:parent-style-name="Heading_20_1">
      <style:paragraph-properties fo:margin-top="0.423cm" fo:margin-bottom="0.282cm" style:contextual-spacing="false" fo:text-align="start" style:justify-single-word="false" style:writing-mode="lr-tb"/>
    </style:style>
    <style:style style:name="P2" style:family="paragraph" style:parent-style-name="Text_20_body">
      <style:paragraph-properties fo:margin-left="0cm" fo:margin-right="0cm" fo:text-indent="0cm" style:auto-text-indent="false" style:writing-mode="lr-tb"/>
    </style:style>
    <style:style style:name="P3" style:family="paragraph" style:parent-style-name="Heading_20_2" style:list-style-name="">
      <style:paragraph-properties fo:margin-left="2.499cm" fo:margin-right="2.499cm" fo:margin-top="0.706cm" fo:margin-bottom="0.212cm" style:contextual-spacing="false" fo:text-align="start" style:justify-single-word="false" fo:text-indent="0cm" style:auto-text-indent="false" style:writing-mode="lr-tb"/>
    </style:style>
    <style:style style:name="P4" style:family="paragraph" style:parent-style-name="Text_20_body">
      <style:paragraph-properties fo:margin-left="0.176cm" fo:margin-right="0.176cm" fo:margin-top="0.176cm" fo:margin-bottom="0.176cm" style:contextual-spacing="false" fo:line-height="145%" fo:text-align="justify" style:justify-single-word="false" style:writing-mode="lr-tb"/>
    </style:style>
    <style:style style:name="P5" style:family="paragraph" style:parent-style-name="Contenuto_20_tabella">
      <style:paragraph-properties fo:margin-left="0cm" fo:margin-right="0cm" fo:margin-top="0.176cm" fo:margin-bottom="0.176cm" style:contextual-spacing="false" fo:text-indent="0cm" style:auto-text-indent="false" style:writing-mode="lr-tb"/>
    </style:style>
    <style:style style:name="P6" style:family="paragraph" style:parent-style-name="Contenuto_20_tabella">
      <style:paragraph-properties fo:margin-top="0.176cm" fo:margin-bottom="0.176cm" style:contextual-spacing="false" style:writing-mode="lr-tb"/>
    </style:style>
    <style:style style:name="P7" style:family="paragraph" style:parent-style-name="Text_20_body">
      <style:paragraph-properties fo:margin-left="0cm" fo:margin-right="0cm" fo:text-align="start" style:justify-single-word="false" fo:text-indent="0cm" style:auto-text-indent="false" style:writing-mode="lr-tb"/>
    </style:style>
    <style:style style:name="P8" style:family="paragraph" style:parent-style-name="Text_20_body">
      <style:paragraph-properties fo:margin-left="0cm" fo:margin-right="0cm" fo:margin-top="1.058cm" fo:margin-bottom="0.176cm" style:contextual-spacing="false" fo:text-indent="0cm" style:auto-text-indent="false" fo:padding-left="0cm" fo:padding-right="0cm" fo:padding-top="0.141cm" fo:padding-bottom="0cm" fo:border-left="none" fo:border-right="none" fo:border-top="0.26pt solid #aaaaaa" fo:border-bottom="none" style:writing-mode="lr-tb"/>
    </style:style>
    <style:style style:name="T1" style:family="text">
      <style:text-properties fo:font-style="italic" fo:font-weight="bold" style:font-style-asian="italic" style:font-weight-asian="bold"/>
    </style:style>
    <style:style style:name="T2" style:family="text">
      <style:text-properties fo:font-style="normal" fo:font-weight="normal" style:font-style-asian="normal" style:font-weight-asian="normal"/>
    </style:style>
    <style:style style:name="T3" style:family="text">
      <style:text-properties fo:font-style="normal" fo:font-weight="bold" style:font-style-asian="normal" style:font-weight-asian="bold"/>
    </style:style>
    <style:style style:name="T4" style:family="text">
      <style:text-properties fo:font-weight="bold" style:font-weight-asian="bold"/>
    </style:style>
    <style:style style:name="T5" style:family="text">
      <style:text-properties fo:color="#555555" loext:opacity="100%" fo:font-size="8.5pt" style:font-size-asian="8.5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rect To — Navigation to an Off-Task Fix</text:p>
      <text:p text:style-name="P2">In <text:span text:style-name="T1">GA Aircraft</text:span>, LK8000 allows temporarily deviating to a waypoint outside the task without losing the flight plan. This function is called <text:span text:style-name="T1">Direct To</text:span> and works with a mechanism of <text:span text:style-name="T1">context switching</text:span>: the task is paused, navigation points to the chosen fix, and upon reaching the fix the task resumes automatically from the first logically-forward waypoint in the route — not the geometrically nearest point.</text:p>
      <text:h text:style-name="P3" text:outline-level="2">The flight plan</text:h>
      <text:p text:style-name="P2">In the example the flight plan follows the route <text:span text:style-name="T1">SIBARI FLY → POLICORO → LAGO LAVELLO → NORTH LUCERA → SAN VITO CHIETI → ROSETO DEGLI ABRUZZI → CIVITANOVA → ANCONA</text:span>, viewable from the Task Overview screen.</text:p>
      <text:p text:style-name="P4"><draw:frame draw:style-name="fr1" draw:name="Immagine1" text:anchor-type="as-char" svg:width="8.999cm" svg:height="6.2cm" draw:z-index="0"><draw:image xlink:href="Pictures/10000001000001CC0000013F0AF23863.png" xlink:type="simple" xlink:show="embed" xlink:actuate="onLoad" draw:mime-type="image/png"/></draw:frame></text:p>
      <text:h text:style-name="P3" text:outline-level="2">Task navigation towards POLICORO</text:h>
      <text:p text:style-name="P2">The aircraft departs from SIBARI. The next task waypoint is <text:span text:style-name="T1">POLICORO</text:span>, shown top-left as <text:span text:style-name="T1">T&gt;POLICORO</text:span> with distance 47.8 km, track 24°. The bottom strip shows eHDG, Brg, Dist, NxAvETE and NxAvETA — all referenced to POLICORO.</text:p>
      <text:p text:style-name="P4"><draw:frame draw:style-name="fr1" draw:name="Immagine2" text:anchor-type="as-char" svg:width="8.999cm" svg:height="6.2cm" draw:z-index="1"><draw:image xlink:href="Pictures/10000001000001CC0000013FBB78BD28.png" xlink:type="simple" xlink:show="embed" xlink:actuate="onLoad" draw:mime-type="image/png"/></draw:frame></text:p>
      <text:h text:style-name="P3" text:outline-level="2">Selecting the off-task waypoint</text:h>
      <text:p text:style-name="P2">The pilot needs to divert to <text:span text:style-name="T1">FALCONE - PZ01</text:span>, an airport not in the task. From the waypoint list filter with <text:soft-page-break/><text:span text:style-name="T1">*FAL*</text:span>: LK8000 shows all matching waypoints with distance and bearing. Select <text:span text:style-name="T1">FALCONE - PZ01</text:span> (155 km, 342°): in the waypoint quick window the "Goto" button (non-GA mode) becomes <text:span text:style-name="T1">Direct To</text:span>.</text:p>
      <table:table table:name="Tabella1" table:style-name="Tabella1">
        <table:table-column table:style-name="Tabella1.A"/>
        <table:table-column table:style-name="Tabella1.B"/>
        <table:table-row table:style-name="Tabella1.1">
          <table:table-cell table:style-name="Tabella1.A1" office:value-type="string">
            <text:p text:style-name="P5"><draw:frame draw:style-name="fr1" draw:name="Immagine3" text:anchor-type="as-char" svg:width="7.2cm" svg:height="5.001cm" draw:z-index="2"><draw:image xlink:href="Pictures/1000000100000154000000EC053F792C.png" xlink:type="simple" xlink:show="embed" xlink:actuate="onLoad" draw:mime-type="image/png"/><svg:desc>Ricerca FAL</svg:desc></draw:frame></text:p>
          </table:table-cell>
          <table:table-cell table:style-name="Tabella1.A1" office:value-type="string">
            <text:p text:style-name="P6"><draw:frame draw:style-name="fr1" draw:name="Immagine4" text:anchor-type="as-char" svg:width="7.2cm" svg:height="5.001cm" draw:z-index="3"><draw:image xlink:href="Pictures/1000000100000154000000EC75E110A4.png" xlink:type="simple" xlink:show="embed" xlink:actuate="onLoad" draw:mime-type="image/png"/><svg:desc>Finestra rapida</svg:desc></draw:frame></text:p>
          </table:table-cell>
        </table:table-row>
      </table:table>
      <text:h text:style-name="P3" text:outline-level="2">Confirming with the countdown</text:h>
      <text:p text:style-name="P2"><text:span text:style-name="T2">Pressing </text:span><text:span text:style-name="T3">Direct To</text:span><text:span text:style-name="T2"> brings up the confirmation popup with a </text:span><text:span text:style-name="T3">10 seconds</text:span><text:span text:style-name="T2"> and the fix name. The popup shows bearing (BRG) and distance (DIST) to the fix from the current position, together with estimated time en-route (ETE) and estimated time of arrival (ETA). The pilot can wait for automatic expiry or press </text:span><text:span text:style-name="T3">Cancel</text:span><text:span text:style-name="T2">. The task remains unchanged in memory. The autopilot stays on the previous target for the entire countdown duration: it switches to the new fix only on confirmation.</text:span></text:p>
      <text:p text:style-name="P4"><draw:frame draw:style-name="fr1" draw:name="Immagine5" text:anchor-type="as-char" svg:width="8.999cm" svg:height="6.2cm" draw:z-index="4"><draw:image xlink:href="Pictures/10000001000003260000022D8CDDB664.png" xlink:type="simple" xlink:show="embed" xlink:actuate="onLoad" draw:mime-type="image/png"/></draw:frame></text:p>
      <text:h text:style-name="P3" text:outline-level="2">Direct To active: navigating to FALCONE</text:h>
      <text:p text:style-name="P2">When the countdown expires all navigation switches to <text:span text:style-name="T1">FALCONE - PZ01</text:span>. Top-left now shows <text:span text:style-name="T1">T&gt;FALCONE</text:span>. The bearing line on the map points directly to the fix and the strip shows Dist, NxAvETE and NxAvETA calculated on FALCONE. The task is intact in memory, simply paused.</text:p>
      <text:p text:style-name="P4"><text:soft-page-break/><draw:frame draw:style-name="fr1" draw:name="Immagine6" text:anchor-type="as-char" svg:width="8.999cm" svg:height="6.2cm" draw:z-index="5"><draw:image xlink:href="Pictures/10000001000001CC0000013FE8CDC3D8.png" xlink:type="simple" xlink:show="embed" xlink:actuate="onLoad" draw:mime-type="image/png"/></draw:frame></text:p>
      <text:h text:style-name="P3" text:outline-level="2">Target window during Direct To</text:h>
      <text:p text:style-name="P2">Opening the <text:span text:style-name="T1">Target window</text:span> during an off-task Direct To the panel adapts automatically: the title shows <text:span text:style-name="T1">Direct To: FALCONE</text:span>, the task point selector is hidden and the fields <text:span text:style-name="T1">Dist</text:span>, <text:span text:style-name="T1">AvETE</text:span> and <text:span text:style-name="T1">AvETA</text:span> are calculated on FALCONE (148.1 km, 36:20, 07:32). The <text:span text:style-name="T1">Approach</text:span> button is available as FALCONE is a certified airport. The map is centred on the fix.</text:p>
      <text:p text:style-name="P4"><draw:frame draw:style-name="fr1" draw:name="Immagine7" text:anchor-type="as-char" svg:width="8.999cm" svg:height="6.2cm" draw:z-index="6"><draw:image xlink:href="Pictures/1000000100000154000000EC7FF9D569.png" xlink:type="simple" xlink:show="embed" xlink:actuate="onLoad" draw:mime-type="image/png"/></draw:frame></text:p>
      <text:h text:style-name="P3" text:outline-level="2">Arrival at FALCONE: automatic task resumption</text:h>
      <text:p text:style-name="P2">When the distance to FALCONE drops below the configured arrival radius (1000 m), LK8000 automatically selects the <text:span text:style-name="T4">first logically-forward task waypoint in the route</text:span> — not the geometrically nearest point. The algorithm compares the direction of the inbound leg to each waypoint with the fix→aircraft vector: if the position is in the "forward" half-plane, that waypoint is already behind and is skipped. In this way, if the aircraft is near LAGO LAVELLO during the diversion, the task resumes from LAGO LAVELLO and not from POLICORO, which is already behind.</text:p>
      <table:table table:name="Tabella2" table:style-name="Tabella2">
        <table:table-column table:style-name="Tabella2.A"/>
        <table:table-column table:style-name="Tabella2.B"/>
        <table:table-row table:style-name="Tabella2.1">
          <table:table-cell table:style-name="Tabella2.A1" office:value-type="string">
            <text:p text:style-name="P5"><draw:frame draw:style-name="fr1" draw:name="Immagine8" text:anchor-type="as-char" svg:width="7.2cm" svg:height="5.001cm" draw:z-index="7"><draw:image xlink:href="Pictures/10000001000001CC0000013FDCC979AE.png" xlink:type="simple" xlink:show="embed" xlink:actuate="onLoad" draw:mime-type="image/png"/><svg:desc>Ripresa task</svg:desc></draw:frame></text:p>
          </table:table-cell>
          <table:table-cell table:style-name="Tabella2.A1" office:value-type="string">
            <text:p text:style-name="P6"><draw:frame draw:style-name="fr1" draw:name="Immagine9" text:anchor-type="as-char" svg:width="7.2cm" svg:height="5.001cm" draw:z-index="8"><draw:image xlink:href="Pictures/1000000100000154000000ECBD925DFB.png" xlink:type="simple" xlink:show="embed" xlink:actuate="onLoad" draw:mime-type="image/png"/><svg:desc>Finestra Target normale</svg:desc></draw:frame><text:soft-page-break/></text:p>
          </table:table-cell>
        </table:table-row>
      </table:table>
      <text:h text:style-name="P3" text:outline-level="2">Continuing towards LAGO LAVELLO</text:h>
      <text:p text:style-name="P2">The task continues normally towards <text:span text:style-name="T1">LAGO LAVELLO</text:span> with distance 10.8 km, track 280° and NxAvETE 02:39. All subsequent task points remain in sequence.</text:p>
      <text:p text:style-name="P4"><draw:frame draw:style-name="fr1" draw:name="Immagine10" text:anchor-type="as-char" svg:width="8.999cm" svg:height="6.2cm" draw:z-index="9"><draw:image xlink:href="Pictures/10000001000001CC0000013FA9D13626.png" xlink:type="simple" xlink:show="embed" xlink:actuate="onLoad" draw:mime-type="image/png"/></draw:frame></text:p>
      <text:p text:style-name="P1">Direct To — Skip to a Task Point</text:p>
      <text:p text:style-name="P2">In addition to deviating to off-task fixes, the <text:span text:style-name="T1">Direct To</text:span> function allows jumping directly to any remaining task point. This mode is activated from the <text:span text:style-name="T1">Target window</text:span> and is useful in two typical situations.</text:p>
      <text:p text:style-name="P2"><text:span text:style-name="T1">Pilot's own decision:</text:span> the pilot decides to skip one or more intermediate waypoints to optimise the route based on weather, fuel consumption or time available.</text:p>
      <text:p text:style-name="P2"><text:span text:style-name="T1">ATC instruction:</text:span> the controller asks "Are you able to proceed direct to [waypoint]?" and the pilot must set the new target in a few seconds without leaving the flight screen.</text:p>
      <text:h text:style-name="P3" text:outline-level="2">Task navigation towards NORTH LUCERA</text:h>
      <text:p text:style-name="P2">The pilot is flying towards <text:span text:style-name="T1">NORTH LUCERA</text:span> (T&gt;NORTH LUC, 25.1 km, Brg 317°, NxAvETE 06:18, NxAvETA 07:21). SAN VITO CHIETI and ROSETO DEGLI ABRUZZI follow in the task.</text:p>
      <text:p text:style-name="P4"><draw:frame draw:style-name="fr1" draw:name="Immagine11" text:anchor-type="as-char" svg:width="8.999cm" svg:height="6.2cm" draw:z-index="10"><draw:image xlink:href="Pictures/10000001000003260000022D9D199BE9.png" xlink:type="simple" xlink:show="embed" xlink:actuate="onLoad" draw:mime-type="image/png"/></draw:frame></text:p>
      <text:h text:style-name="P3" text:outline-level="2"><text:soft-page-break/>Selecting the task point from the Target window</text:h>
      <text:p text:style-name="P2">The pilot opens the <text:span text:style-name="T1">Target window</text:span>. The panel shows the active point: <text:span text:style-name="T4">Tp 3 NORTH LUCERA</text:span>, Dist 58.6 km, AvETE 14:22, AvETA 14:40. Using the <text:span text:style-name="T4">&gt;</text:span> button the pilot scrolls through the subsequent waypoints.</text:p>
      <text:p text:style-name="P2">For each selected waypoint the map centres on the point and the bearing line always shows the <text:span text:style-name="T4">direct bearing from the aircraft to the waypoint</text:span> — regardless of which task point is currently active. The fields <text:span text:style-name="T4">Dist</text:span>, <text:span text:style-name="T4">AvETE</text:span> and <text:span text:style-name="T4">AvETA</text:span> are updated in real time based on the current position toward the displayed waypoint: the pilot immediately knows distance, estimated time and arrival time without confirming anything.</text:p>
      <text:p text:style-name="P2">Advancing to <text:span text:style-name="T4">Tp 4 SAN VITO CHIETINO</text:span> (Dist 164.3 km, AvETE 40:19, AvETA 15:06) the <text:span text:style-name="T4">Direct To</text:span> button appears. Pressing <text:span text:style-name="T4">&gt;</text:span> again reaches <text:span text:style-name="T4">Tp 5 ROSETO DEGLI ABRUZZI</text:span> (Dist 218.7 km, AvETE 53:40, AvETA 15:20). The <text:span text:style-name="T4">&lt;</text:span> and <text:span text:style-name="T4">&gt;</text:span> buttons allow scrolling freely through all task waypoints.</text:p>
      <text:p text:style-name="P7"><draw:frame draw:style-name="fr2" draw:name="Picture 17" text:anchor-type="as-char" svg:width="8.382cm" svg:height="5.793cm" draw:z-index="11"><draw:image xlink:href="Pictures/10000001000003260000022DF457D93D.png" xlink:type="simple" xlink:show="embed" xlink:actuate="onLoad" draw:mime-type="image/png"/></draw:frame></text:p>
      <text:p text:style-name="P7"><draw:frame draw:style-name="fr2" draw:name="Picture 18" text:anchor-type="as-char" svg:width="8.382cm" svg:height="5.793cm" draw:z-index="12"><draw:image xlink:href="Pictures/10000001000003260000022DC5757E08.png" xlink:type="simple" xlink:show="embed" xlink:actuate="onLoad" draw:mime-type="image/png"/></draw:frame></text:p>
      <text:h text:style-name="P3" text:outline-level="2">Confirming with the countdown</text:h>
      <text:p text:style-name="P2"><text:span text:style-name="T2">Pressing </text:span><text:span text:style-name="T3">Direct To</text:span><text:span text:style-name="T2"> in the Target window brings up the confirmation popup with a </text:span><text:span text:style-name="T3">10 seconds</text:span><text:span text:style-name="T2">. As with the off-task Direct To, the popup shows </text:span><text:span text:style-name="T3">BRG, DIST, ETE and ETA</text:span><text:span text:style-name="T2"> calculated from the current position to </text:span><text:soft-page-break/><text:span text:style-name="T2">the selected task waypoint. When the countdown ends navigation switches immediately to the new task point.</text:span></text:p>
      <text:p text:style-name="P4"><draw:frame draw:style-name="fr1" draw:name="Immagine14" text:anchor-type="as-char" svg:width="8.999cm" svg:height="6.2cm" draw:z-index="13"><draw:image xlink:href="Pictures/10000001000003260000022D821E3D37.png" xlink:type="simple" xlink:show="embed" xlink:actuate="onLoad" draw:mime-type="image/png"/></draw:frame></text:p>
      <text:h text:style-name="P3" text:outline-level="2">Direct To confirmed: navigating to ROSETO</text:h>
      <text:p text:style-name="P2">Navigation switches to <text:span text:style-name="T1">ROSETO DEGLI ABRUZZI</text:span> (T&gt;ROSETO DE..., 182 km, Brg 321°, NxAvETE 45:46). The bearing line points directly to ROSETO ignoring intermediate points. Re-opening the Target window the title remains <text:span text:style-name="T1">"Target"</text:span> — not "Direct To: ..." as in the off-task case — because the point is already in the task and ActiveTaskPoint has simply advanced to Tp 5 (Dist 181.0 km, AvETE 45:27, AvETA 08:02).</text:p>
      <table:table table:name="Tabella3" table:style-name="Tabella3">
        <table:table-column table:style-name="Tabella3.A"/>
        <table:table-column table:style-name="Tabella3.B"/>
        <table:table-row table:style-name="Tabella3.1">
          <table:table-cell table:style-name="Tabella3.A1" office:value-type="string">
            <text:p text:style-name="P5"><draw:frame draw:style-name="fr1" draw:name="Immagine15" text:anchor-type="as-char" svg:width="7.2cm" svg:height="5.001cm" draw:z-index="14"><draw:image xlink:href="Pictures/1000000100000154000000EC135CAA1B.png" xlink:type="simple" xlink:show="embed" xlink:actuate="onLoad" draw:mime-type="image/png"/><svg:desc>T&gt;ROSETO mappa</svg:desc></draw:frame></text:p>
          </table:table-cell>
          <table:table-cell table:style-name="Tabella3.A1" office:value-type="string">
            <text:p text:style-name="P6"><draw:frame draw:style-name="fr1" draw:name="Immagine16" text:anchor-type="as-char" svg:width="7.2cm" svg:height="5.001cm" draw:z-index="15"><draw:image xlink:href="Pictures/1000000100000154000000ECF03FEA26.png" xlink:type="simple" xlink:show="embed" xlink:actuate="onLoad" draw:mime-type="image/png"/><svg:desc>Finestra Target Tp5</svg:desc></draw:frame></text:p>
          </table:table-cell>
        </table:table-row>
      </table:table>
      <text:h text:style-name="P3" text:outline-level="2">Note — Effects on the LK8000 Generic Autopilot driver</text:h>
      <text:p text:style-name="P2">The Direct To manoeuvres described in this document act directly on the LK8000 <text:span text:style-name="T1">Generic Autopilot</text:span> driver, which generates the <text:span text:style-name="T1">NMEA $GPRMB</text:span> messages transmitted to the connected autopilot.</text:p>
      <text:p text:style-name="P2"><text:span text:style-name="T4">NB:</text:span> The pilot does not need to change any autopilot settings during these manoeuvres. LK8000 automatically updates destination and XTE at the time of Direct To and at the time of task resumption.</text:p>
      <text:p text:style-name="P2"><text:span text:style-name="T1">Normal task:</text:span> $GPRMB contains the next task waypoint as destination; XTE is calculated relative to the active leg track.</text:p>
      <text:p text:style-name="P2"><text:span text:style-name="T1">Direct To towards off-task fix:</text:span> as soon as the countdown confirms the Direct To, $GPRMB switches immediately to the fix as destination. XTE is calculated relative to the direct track from the activation position to the fix.</text:p>
      <text:p text:style-name="P2"><text:span text:style-name="T1">Automatic task resumption:</text:span> upon reaching the fix $GPRMB switches to the new next <text:soft-page-break/>task waypoint. XTE is calculated from the fix position towards the new target, ensuring continuity of lateral guidance without discontinuity.</text:p>
      <text:p text:style-name="P2"><text:span text:style-name="T1">Direct To towards task point:</text:span> the system immediately activates a DIRECT leg from the confirmation position to the selected fix; $GPRMB transmits XTE and bearing to intercept and maintain the direct track, minimising the residual distance.</text:p>
      <text:p text:style-name="P8" loext:marker-style-name="T5"><text:span text:style-name="T5">LK8000 Tactical Flight Computer — GA Direct To Function · Draft EN · June 2026 </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mily-generic="roman" style:font-pitch="variable"/>
    <style:font-face style:name="Arial1" svg:font-family="Arial, sans-serif"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fals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2cm" style:writing-mode="page"/>
      <style:text-properties style:use-window-font-color="true" loext:opacity="0%" style:font-name="Liberation Serif" fo:font-size="12pt" fo:language="it" fo:country="IT" style:letter-kerning="fals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499cm" fo:margin-right="2.499cm" fo:margin-top="2cm" fo:margin-bottom="2cm" style:contextual-spacing="false" fo:text-align="start" style:justify-single-word="false" fo:orphans="0" fo:widows="0" fo:hyphenation-ladder-count="no-limit" fo:hyphenation-keep="auto" loext:hyphenation-keep-type="column" style:punctuation-wrap="simple" style:writing-mode="lr-tb"/>
      <style:text-properties fo:color="#000000" loext:opacity="100%" style:font-name="Arial" fo:font-family="Arial, sans-serif" style:font-family-generic="roman" style:font-pitch="variable" fo:font-size="11pt" fo:language="it" fo:country="IT" style:font-name-asian="Arial1" style:font-family-asian="Arial, sans-serif" style:font-family-generic-asian="system" style:font-pitch-asian="variable" style:font-size-asian="11pt" style:language-asian="zh" style:country-asian="CN" style:font-name-complex="Arial1" style:font-family-complex="Arial, sans-serif"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176cm" fo:margin-right="0.176cm" fo:margin-top="0.176cm" fo:margin-bottom="0.176cm" style:contextual-spacing="false" fo:line-height="145%"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olo" style:next-style-name="Text_20_body" style:class="chapter">
      <style:paragraph-properties fo:margin-top="0.423cm" fo:margin-bottom="0.28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itolo" style:next-style-name="Text_20_body" style:default-outline-level="2" style:list-style-name="" style:class="chapter">
      <style:paragraph-properties fo:margin-left="2.499cm" fo:margin-top="0.706cm" fo:margin-bottom="0.212cm" style:contextual-spacing="false"/>
      <style:text-properties style:font-name="Liberation Serif" fo:font-family="'Liberation Serif'"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nea_20_orizzontale" style:display-name="Linea orizzontale" style:family="paragraph" style:parent-style-name="Standard" style:next-style-name="Text_20_body">
      <style:paragraph-properties fo:margin-top="0cm" fo:margin-bottom="0.499cm" style:contextual-spacing="false" style:border-line-width-bottom="0.009cm 0.009cm 0.009cm" fo:padding="0cm" fo:border-left="none" fo:border-right="none" fo:border-top="none" fo:border-bottom="0.74pt double #808080"/>
      <style:text-properties fo:font-size="6pt" style:font-size-asian="6pt"/>
    </style:style>
    <style:style style:name="Sender" style:family="paragraph" style:parent-style-name="Standard" style:class="extra">
      <style:text-properties fo:font-style="italic" style:font-style-asian="italic"/>
    </style:style>
    <style:style style:name="Contenuto_20_tabella" style:display-name="Contenuto tabella" style:family="paragraph" style:parent-style-name="Text_20_body"/>
    <style:style style:name="Titolo" style:family="paragraph" style:parent-style-name="Standard" style:next-style-name="Text_20_body">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Indice" style:family="paragraph" style:parent-style-name="Standard">
      <style:paragraph-properties text:number-lines="false" text:line-number="0"/>
    </style:style>
    <style:style style:name="Titolo_20_tabella" style:display-name="Titolo tabella" style:family="paragraph" style:parent-style-name="Contenuto_20_tabell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Caratteri_20_nota_20_di_20_chiusura" style:display-name="Caratteri nota di chiusura" style:family="text"/>
    <style:style style:name="Caratteri_20_nota_20_a_20_piè_20_di_20_pagina" style:display-name="Caratteri nota a piè di pagina"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it-IT</dc:language>
    <meta:editing-cycles>1</meta:editing-cycles>
    <meta:editing-duration>PT2M10S</meta:editing-duration>
    <meta:generator>LibreOffice/25.2.3.2$Linux_X86_64 LibreOffice_project/520$Build-2</meta:generator>
    <dc:date>2026-06-07T15:39:20.634349516</dc:date>
    <meta:document-statistic meta:table-count="3" meta:image-count="16" meta:object-count="0" meta:page-count="7" meta:paragraph-count="56" meta:word-count="1162" meta:character-count="7248" meta:non-whitespace-character-count="6116"/>
    <meta:user-defined meta:name="AppVersion">15.0000</meta:user-defined>
  </office:meta>
</office:document-meta>
</file>