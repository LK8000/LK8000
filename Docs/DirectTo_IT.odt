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C0000013F0AF23863.png" manifest:media-type="image/png"/>
  <manifest:file-entry manifest:full-path="Pictures/10000001000001CC0000013FDCC979AE.png" manifest:media-type="image/png"/>
  <manifest:file-entry manifest:full-path="Pictures/1000000100000154000000EC053F792C.png" manifest:media-type="image/png"/>
  <manifest:file-entry manifest:full-path="Pictures/1000000100000154000000EC75E110A4.png" manifest:media-type="image/png"/>
  <manifest:file-entry manifest:full-path="Pictures/1000000100000154000000EC135CAA1B.png" manifest:media-type="image/png"/>
  <manifest:file-entry manifest:full-path="Pictures/1000000100000154000000EC7FF9D569.png" manifest:media-type="image/png"/>
  <manifest:file-entry manifest:full-path="Pictures/1000000100000154000000EC234C5056.png" manifest:media-type="image/png"/>
  <manifest:file-entry manifest:full-path="Pictures/1000000100000154000000ECF03FEA26.png" manifest:media-type="image/png"/>
  <manifest:file-entry manifest:full-path="Pictures/10000001000001CC0000013FE8CDC3D8.png" manifest:media-type="image/png"/>
  <manifest:file-entry manifest:full-path="Pictures/1000000100000154000000ECBD925DFB.png" manifest:media-type="image/png"/>
  <manifest:file-entry manifest:full-path="Pictures/10000001000001CC0000013F426E71F2.png" manifest:media-type="image/png"/>
  <manifest:file-entry manifest:full-path="Pictures/10000001000001CC0000013FBB78BD28.png" manifest:media-type="image/png"/>
  <manifest:file-entry manifest:full-path="Pictures/10000001000001CC0000013FA9D13626.png" manifest:media-type="image/png"/>
  <manifest:file-entry manifest:full-path="Pictures/10000001000001CC0000013F7CACB73D.png" manifest:media-type="image/png"/>
  <manifest:file-entry manifest:full-path="Pictures/1000000100000154000000EC92E4BA06.png" manifest:media-type="image/png"/>
  <manifest:file-entry manifest:full-path="Pictures/1000000100000154000000EC508A9C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8.891cm" fo:margin-top="0.212cm" fo:margin-bottom="0.212cm" table:align="margins" table:border-model="collapsing"/>
    </style:style>
    <style:style style:name="Tabella1.A" style:family="table-column">
      <style:table-column-properties style:column-width="9.446cm" style:rel-column-width="32767*"/>
    </style:style>
    <style:style style:name="Tabella1.B" style:family="table-column">
      <style:table-column-properties style:column-width="9.446cm" style:rel-column-width="32768*"/>
    </style:style>
    <style:style style:name="Tabella1.A1" style:family="table-cell">
      <style:table-cell-properties fo:padding="0.102cm" fo:border="none"/>
    </style:style>
    <style:style style:name="Tabella2" style:family="table">
      <style:table-properties style:width="18.891cm" fo:margin-top="0.212cm" fo:margin-bottom="0.212cm" table:align="margins" table:border-model="collapsing"/>
    </style:style>
    <style:style style:name="Tabella2.A" style:family="table-column">
      <style:table-column-properties style:column-width="9.446cm" style:rel-column-width="32767*"/>
    </style:style>
    <style:style style:name="Tabella2.B" style:family="table-column">
      <style:table-column-properties style:column-width="9.446cm" style:rel-column-width="32768*"/>
    </style:style>
    <style:style style:name="Tabella2.A1" style:family="table-cell">
      <style:table-cell-properties fo:padding="0.102cm" fo:border="none"/>
    </style:style>
    <style:style style:name="Tabella3" style:family="table">
      <style:table-properties style:width="18.891cm" fo:margin-top="0.212cm" fo:margin-bottom="0.212cm" table:align="margins" table:border-model="collapsing"/>
    </style:style>
    <style:style style:name="Tabella3.A" style:family="table-column">
      <style:table-column-properties style:column-width="9.446cm" style:rel-column-width="32767*"/>
    </style:style>
    <style:style style:name="Tabella3.B" style:family="table-column">
      <style:table-column-properties style:column-width="9.446cm" style:rel-column-width="32768*"/>
    </style:style>
    <style:style style:name="Tabella3.A1" style:family="table-cell">
      <style:table-cell-properties fo:padding="0.102cm" fo:border="none"/>
    </style:style>
    <style:style style:name="Tabella4" style:family="table">
      <style:table-properties style:width="18.891cm" fo:margin-top="0.212cm" fo:margin-bottom="0.212cm" table:align="margins" table:border-model="collapsing"/>
    </style:style>
    <style:style style:name="Tabella4.A" style:family="table-column">
      <style:table-column-properties style:column-width="9.446cm" style:rel-column-width="32767*"/>
    </style:style>
    <style:style style:name="Tabella4.B" style:family="table-column">
      <style:table-column-properties style:column-width="9.446cm" style:rel-column-width="32768*"/>
    </style:style>
    <style:style style:name="Tabella4.A1" style:family="table-cell">
      <style:table-cell-properties fo:padding="0.102cm" fo:border="none"/>
    </style:style>
    <style:style style:name="P1" style:family="paragraph" style:parent-style-name="Heading_20_1">
      <style:paragraph-properties fo:margin-top="0.847cm" fo:margin-bottom="0.212cm" style:contextual-spacing="false" fo:text-align="start" style:justify-single-word="false" fo:orphans="2" fo:widows="2" style:writing-mode="lr-tb"/>
    </style:style>
    <style:style style:name="P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font-size="12pt" style:font-size-asian="12pt" style:font-size-complex="12pt"/>
    </style:style>
    <style:style style:name="P3" style:family="paragraph" style:parent-style-name="Heading_20_1">
      <style:paragraph-properties fo:margin-top="0.847cm" fo:margin-bottom="0.212cm" style:contextual-spacing="false" fo:line-height="100%"/>
    </style:style>
    <style:style style:name="P4" style:family="paragraph" style:parent-style-name="Heading_20_2">
      <style:paragraph-properties fo:margin-top="0.423cm" fo:margin-bottom="0.212cm" style:contextual-spacing="false" fo:line-height="100%"/>
    </style:style>
    <style:style style:name="P5" style:family="paragraph" style:parent-style-name="Standard">
      <style:paragraph-properties fo:margin-top="0.212cm" fo:margin-bottom="0.212cm" style:contextual-spacing="false" fo:line-height="100%"/>
    </style:style>
    <style:style style:name="P6" style:family="paragraph" style:parent-style-name="Heading_20_2">
      <style:paragraph-properties fo:margin-top="0.423cm" fo:margin-bottom="0.212cm" style:contextual-spacing="false" fo:line-height="100%"/>
      <style:text-properties fo:font-size="12pt" style:font-size-asian="12pt" style:font-size-complex="12pt"/>
    </style:style>
    <style:style style:name="P7" style:family="paragraph" style:parent-style-name="Heading_20_1">
      <style:paragraph-properties fo:margin-top="0.423cm" fo:margin-bottom="0.212cm" style:contextual-spacing="false" fo:line-height="100%" fo:break-before="page"/>
    </style:style>
    <style:style style:name="P8" style:family="paragraph" style:parent-style-name="Heading_20_2">
      <style:paragraph-properties fo:margin-top="0.423cm" fo:margin-bottom="0.212cm" style:contextual-spacing="false" fo:line-height="100%"/>
      <style:text-properties officeooo:paragraph-rsid="00097556"/>
    </style:style>
    <style:style style:name="P9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font-size="12pt" officeooo:paragraph-rsid="00097556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fr1" style:family="graphic" style:parent-style-name="Graphics">
      <style:graphic-properties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iazione Generale Funzioni DIRECT TO</text:p>
      <text:p text:style-name="P2">Le funzioni descritte in questo documento sono disponibili <text:span text:style-name="T1">esclusivamente in modalità GA Aircraft</text:span>. Per selezionare la categoria aereo: <text:span text:style-name="T2">Config (icona ingranaggio) → Configuraz. Pilota → Categoria → GA Aircraft</text:span>. Dopo aver cambiato categoria è necessario riavviare LK8000.</text:p>
      <text:p text:style-name="P3">Direct To - Navigazione verso un Fix Off-Task</text:p>
      <text:p text:style-name="P2">In modalita <text:span text:style-name="T2">GA Aircraft</text:span>, LK8000 consente di deviare temporaneamente verso un waypoint esterno alla task senza perdere il piano di volo. Questa funzione si chiama <text:span text:style-name="T2">Direct To</text:span> e funziona con un meccanismo di <text:span text:style-name="T2">context switching</text:span>: la task viene messa in pausa, la navigazione punta al fix scelto e al raggiungimento del fix la task riprende automaticamente dal punto rimanente piu vicino alla posizione corrente.</text:p>
      <text:p text:style-name="P4">Il piano di volo</text:p>
      <text:p text:style-name="P2">Nell'esempio il piano di volo prevede la rotta <text:span text:style-name="T2">SIBARI FLY - POLICORO - LAGO LAVELLO - NORTH LUCERA - SAN VITO CHIETI - ROSETO DEGLI ABRUZZI - CIVITANOVA - ANCONA</text:span>, consultabile dalla schermata Task Overview.</text:p>
      <text:p text:style-name="P5"><draw:frame draw:style-name="fr1" draw:name="a10.png" text:anchor-type="as-char" svg:width="8.601cm" svg:height="6.001cm" draw:z-index="0"><draw:image xlink:href="Pictures/10000001000001CC0000013F0AF23863.png" xlink:type="simple" xlink:show="embed" xlink:actuate="onLoad" draw:mime-type="image/png"/></draw:frame></text:p>
      <text:p text:style-name="P4">Navigazione in task verso POLICORO</text:p>
      <text:p text:style-name="P2">L'aereo parte da SIBARI. Il prossimo waypoint di task e <text:span text:style-name="T2">POLICORO</text:span>, mostrato come <text:span text:style-name="T2">T&gt;POLICORO</text:span> con distanza 47.8 km, rotta 24 gradi. La strip inferiore riporta eHDG, Brg, Dist, NxAvETE e NxAvETA riferiti a POLICORO.</text:p>
      <text:p text:style-name="P5"><text:soft-page-break/><draw:frame draw:style-name="fr1" draw:name="a1.png" text:anchor-type="as-char" svg:width="8.601cm" svg:height="6.001cm" draw:z-index="1"><draw:image xlink:href="Pictures/10000001000001CC0000013FBB78BD28.png" xlink:type="simple" xlink:show="embed" xlink:actuate="onLoad" draw:mime-type="image/png"/></draw:frame></text:p>
      <text:p text:style-name="P4">Selezione del waypoint off-task</text:p>
      <text:p text:style-name="P2">Il pilota deve deviare verso <text:span text:style-name="T2">FALCONE - PZ01</text:span>, aeroporto non in task. Dalla lista waypoint si filtra con <text:span text:style-name="T2">*FAL*</text:span>: si seleziona <text:span text:style-name="T2">FALCONE - PZ01</text:span> (155 km, 342 gradi). Nella finestra rapida il pulsante Goto della modalita non-GA diventa <text:span text:style-name="T2">Direct To</text:span>.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<draw:frame draw:style-name="fr1" draw:name="a2.png" text:anchor-type="as-char" svg:width="7.999cm" svg:height="5.6cm" draw:z-index="2"><draw:image xlink:href="Pictures/1000000100000154000000EC053F792C.png" xlink:type="simple" xlink:show="embed" xlink:actuate="onLoad" draw:mime-type="image/png"/></draw:frame></text:p>
          </table:table-cell>
          <table:table-cell table:style-name="Tabella1.A1" office:value-type="string">
            <text:p text:style-name="P5"><draw:frame draw:style-name="fr1" draw:name="a3.png" text:anchor-type="as-char" svg:width="7.999cm" svg:height="5.6cm" draw:z-index="3"><draw:image xlink:href="Pictures/1000000100000154000000EC75E110A4.png" xlink:type="simple" xlink:show="embed" xlink:actuate="onLoad" draw:mime-type="image/png"/></draw:frame></text:p>
          </table:table-cell>
        </table:table-row>
      </table:table>
      <text:p text:style-name="P4">Conferma con il countdown</text:p>
      <text:p text:style-name="P2">Premendo <text:span text:style-name="T2">Direct To</text:span> appare il popup di conferma con countdown di <text:span text:style-name="T2">10 secondi</text:span> e il nome del fix. Il pilota puo attendere la scadenza automatica oppure premere <text:span text:style-name="T2">Cancel</text:span>. La task rimane invariata in memoria.</text:p>
      <text:p text:style-name="P5"><draw:frame draw:style-name="fr1" draw:name="a4.png" text:anchor-type="as-char" svg:width="8.601cm" svg:height="6.001cm" draw:z-index="4"><draw:image xlink:href="Pictures/1000000100000154000000EC234C5056.png" xlink:type="simple" xlink:show="embed" xlink:actuate="onLoad" draw:mime-type="image/png"/></draw:frame></text:p>
      <text:p text:style-name="P4"><text:soft-page-break/>Direct To attivo: navigazione verso FALCONE</text:p>
      <text:p text:style-name="P2">Allo scadere del countdown la navigazione commuta su <text:span text:style-name="T2">FALCONE - PZ01</text:span>. In alto a sinistra compare <text:span text:style-name="T2">T&gt;FALCONE</text:span>. La linea di bearing punta direttamente al fix; la strip riporta Dist, NxAvETE e NxAvETA calcolati su FALCONE. La task e integra in memoria, semplicemente in pausa.</text:p>
      <text:p text:style-name="P5"><draw:frame draw:style-name="fr1" draw:name="a5.png" text:anchor-type="as-char" svg:width="8.601cm" svg:height="6.001cm" draw:z-index="5"><draw:image xlink:href="Pictures/10000001000001CC0000013FE8CDC3D8.png" xlink:type="simple" xlink:show="embed" xlink:actuate="onLoad" draw:mime-type="image/png"/></draw:frame></text:p>
      <text:p text:style-name="P4">Finestra Target durante il Direct To</text:p>
      <text:p text:style-name="P2">Aprendo la <text:span text:style-name="T2">finestra Target</text:span> il pannello si adatta: il titolo mostra <text:span text:style-name="T2">Direct To: FALCONE</text:span>, il selettore task e nascosto e i campi <text:span text:style-name="T2">Dist</text:span>, <text:span text:style-name="T2">AvETE</text:span>, <text:span text:style-name="T2">AvETA</text:span> sono calcolati su FALCONE (148.1 km, 36:20, 07:32). Il pulsante <text:span text:style-name="T2">Approach</text:span> e disponibile in quanto FALCONE e un aeroporto certificato.</text:p>
      <text:p text:style-name="P5"><draw:frame draw:style-name="fr1" draw:name="a6.png" text:anchor-type="as-char" svg:width="8.601cm" svg:height="6.001cm" draw:z-index="6"><draw:image xlink:href="Pictures/1000000100000154000000EC7FF9D569.png" xlink:type="simple" xlink:show="embed" xlink:actuate="onLoad" draw:mime-type="image/png"/></draw:frame></text:p>
      <text:p text:style-name="P4">Arrivo a FALCONE: ripresa automatica della task</text:p>
      <text:p text:style-name="P2">Quando la distanza da FALCONE scende sotto il raggio di arrivo, LK8000 identifica il punto di task rimanente <text:span text:style-name="T2">piu vicino alla posizione attuale</text:span> e vi commuta la navigazione. Nell'esempio POLICORO viene saltato automaticamente perche piu distante di <text:span text:style-name="T2">LAGO LAVELLO</text:span>, che diventa il nuovo target.</text:p>
      <table:table table:name="Tabella2" table:style-name="Tabella2">
        <table:table-column table:style-name="Tabella2.A"/>
        <table:table-column table:style-name="Tabella2.B"/>
        <text:soft-page-break/>
        <table:table-row>
          <table:table-cell table:style-name="Tabella2.A1" office:value-type="string">
            <text:p text:style-name="P5"><draw:frame draw:style-name="fr1" draw:name="a7.png" text:anchor-type="as-char" svg:width="7.999cm" svg:height="5.6cm" draw:z-index="7"><draw:image xlink:href="Pictures/10000001000001CC0000013FDCC979AE.png" xlink:type="simple" xlink:show="embed" xlink:actuate="onLoad" draw:mime-type="image/png"/></draw:frame></text:p>
          </table:table-cell>
          <table:table-cell table:style-name="Tabella2.A1" office:value-type="string">
            <text:p text:style-name="P5"><draw:frame draw:style-name="fr1" draw:name="a8.png" text:anchor-type="as-char" svg:width="7.999cm" svg:height="5.6cm" draw:z-index="8"><draw:image xlink:href="Pictures/1000000100000154000000ECBD925DFB.png" xlink:type="simple" xlink:show="embed" xlink:actuate="onLoad" draw:mime-type="image/png"/></draw:frame></text:p>
          </table:table-cell>
        </table:table-row>
      </table:table>
      <text:p text:style-name="P4">Proseguimento verso LAGO LAVELLO</text:p>
      <text:p text:style-name="P2">La task prosegue normalmente verso <text:span text:style-name="T2">LAGO LAVELLO</text:span> con distanza 10.8 km, rotta 280 gradi e NxAvETE 02:39. Tutti i punti successivi rimangono in sequenza.</text:p>
      <text:p text:style-name="P5"><draw:frame draw:style-name="fr1" draw:name="a9.png" text:anchor-type="as-char" svg:width="8.601cm" svg:height="6.001cm" draw:z-index="9"><draw:image xlink:href="Pictures/10000001000001CC0000013FA9D13626.png" xlink:type="simple" xlink:show="embed" xlink:actuate="onLoad" draw:mime-type="image/png"/></draw:frame></text:p>
      <text:p text:style-name="P6"/>
      <text:p text:style-name="P7">Direct To - Salto a un Punto della Task</text:p>
      <text:p text:style-name="P2">Oltre alla deviazione verso fix off-task, la funzione <text:span text:style-name="T2">Direct To</text:span> consente di saltare direttamente a qualsiasi punto della task ancora da percorrere, attivandosi dalla <text:span text:style-name="T2">finestra Target</text:span>.</text:p>
      <text:p text:style-name="P2"><text:span text:style-name="T2">Decisione autonoma del pilota:</text:span> si decide di saltare waypoint intermedi per ottimizzare la rotta in base a condizioni meteo, carburante o tempo disponibile.</text:p>
      <text:p text:style-name="P2"><text:span text:style-name="T2">Istruzione ATC:</text:span> l'ente chiede "Siete abili a procedere diretto [waypoint]?" e il pilota deve impostare il nuovo target in pochi secondi senza uscire dalla schermata di volo.</text:p>
      <text:p text:style-name="P4">Navigazione in task verso NORTH LUCERA</text:p>
      <text:p text:style-name="P2">Il pilota sta volando verso <text:span text:style-name="T2">NORTH LUCERA</text:span> (T&gt;NORTH LUC, 25.1 km, Brg 317 gradi, NxAvETE 06:18, NxAvETA 07:21). Nella task seguono SAN VITO CHIETI e ROSETO DEGLI ABRUZZI.</text:p>
      <text:p text:style-name="P5"><draw:frame draw:style-name="fr1" draw:name="b1.png" text:anchor-type="as-char" svg:width="8.601cm" svg:height="6.001cm" draw:z-index="10"><draw:image xlink:href="Pictures/10000001000001CC0000013F7CACB73D.png" xlink:type="simple" xlink:show="embed" xlink:actuate="onLoad" draw:mime-type="image/png"/></draw:frame></text:p>
      <text:p text:style-name="P4">Selezione del punto di task dalla finestra Target</text:p>
      <text:p text:style-name="P2">Il pilota apre la <text:span text:style-name="T2">finestra Target</text:span>. Il pannello mostra il punto attivo: <text:span text:style-name="T2">Tp 3 NORTH LUCERA</text:span>, Dist 24.0 km, AvETE 06:01, AvETA 07:21. Utilizzando il pulsante <text:span text:style-name="T2">&gt;</text:span> il pilota avanza fino a <text:span text:style-name="T2">Tp 5 ROSETO DEGLI ABRUZZI</text:span>, saltando Tp 4 SAN VITO CHIETI. Non appena il punto selezionato e diverso dall'active task point compare il pulsante <text:span text:style-name="T2">Direct To</text:span> e la mappa si centra su ROSETO (Dist 185.5 km, AvETE 46:35)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"><draw:frame draw:style-name="fr1" draw:name="b2.png" text:anchor-type="as-char" svg:width="7.999cm" svg:height="5.6cm" draw:z-index="11"><draw:image xlink:href="Pictures/1000000100000154000000EC92E4BA06.png" xlink:type="simple" xlink:show="embed" xlink:actuate="onLoad" draw:mime-type="image/png"/></draw:frame></text:p>
          </table:table-cell>
          <table:table-cell table:style-name="Tabella3.A1" office:value-type="string">
            <text:p text:style-name="P5"><draw:frame draw:style-name="fr1" draw:name="b3.png" text:anchor-type="as-char" svg:width="7.999cm" svg:height="5.6cm" draw:z-index="12"><draw:image xlink:href="Pictures/1000000100000154000000EC508A9C20.png" xlink:type="simple" xlink:show="embed" xlink:actuate="onLoad" draw:mime-type="image/png"/></draw:frame></text:p>
          </table:table-cell>
        </table:table-row>
      </table:table>
      <text:p text:style-name="P4"><text:soft-page-break/>Conferma con il countdown</text:p>
      <text:p text:style-name="P2">Premendo <text:span text:style-name="T2">Direct To</text:span> appare il popup <text:span text:style-name="T2">Direct to: ROSETO DEGLI ABRUZZI / 7</text:span>. Al termine del countdown <text:span text:style-name="T2">ActiveTaskPoint avanza a Tp 5</text:span>: NORTH LUCERA e SAN VITO CHIETI vengono saltati e la navigazione commuta su ROSETO DEGLI ABRUZZI.</text:p>
      <text:p text:style-name="P5"><draw:frame draw:style-name="fr1" draw:name="b4.png" text:anchor-type="as-char" svg:width="8.601cm" svg:height="6.001cm" draw:z-index="13"><draw:image xlink:href="Pictures/10000001000001CC0000013F426E71F2.png" xlink:type="simple" xlink:show="embed" xlink:actuate="onLoad" draw:mime-type="image/png"/></draw:frame></text:p>
      <text:p text:style-name="P4">Direct To confermato: navigazione verso ROSETO</text:p>
      <text:p text:style-name="P2">La navigazione commuta su <text:span text:style-name="T2">ROSETO DEGLI ABRUZZI</text:span> (T&gt;ROSETO DE..., 182 km, Brg 321 gradi, NxAvETE 45:46). La linea di bearing punta direttamente verso ROSETO. Riaprendo la finestra Target il titolo rimane <text:span text:style-name="T2">Target</text:span> — non Direct To: ... come nel caso off-task — perche il punto e gia nella task e ActiveTaskPoint e semplicemente avanzato a Tp 5 (Dist 181.0 km, AvETE 45:27, AvETA 08:02).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"><draw:frame draw:style-name="fr1" draw:name="b5.png" text:anchor-type="as-char" svg:width="7.999cm" svg:height="5.6cm" draw:z-index="14"><draw:image xlink:href="Pictures/1000000100000154000000EC135CAA1B.png" xlink:type="simple" xlink:show="embed" xlink:actuate="onLoad" draw:mime-type="image/png"/></draw:frame></text:p>
          </table:table-cell>
          <table:table-cell table:style-name="Tabella4.A1" office:value-type="string">
            <text:p text:style-name="P5"><draw:frame draw:style-name="fr1" draw:name="b6.png" text:anchor-type="as-char" svg:width="7.999cm" svg:height="5.6cm" draw:z-index="15"><draw:image xlink:href="Pictures/1000000100000154000000ECF03FEA26.png" xlink:type="simple" xlink:show="embed" xlink:actuate="onLoad" draw:mime-type="image/png"/></draw:frame></text:p>
          </table:table-cell>
        </table:table-row>
      </table:table>
      <text:p text:style-name="P8">Nota bene - Effetti sul driver Generic Autopilot di LK8000</text:p>
      <text:p text:style-name="P9">Le manovre Direct To descritte in questo capitolo agiscono direttamente sul driver <text:span text:style-name="T2">Generic Autopilot</text:span> di LK8000, che genera i messaggi <text:span text:style-name="T2">NMEA $GPRMB</text:span> trasmessi all'autopilota collegato.</text:p>
      <text:p text:style-name="P9"><text:span text:style-name="T1">NB:</text:span> il pilota non deve modificare alcuna impostazione sull'autopilota durante queste manovre. LK8000 aggiorna automaticamente destinazione e XTE al momento del Direct To e al momento della ripresa della task.</text:p>
      <text:p text:style-name="P9"><text:span text:style-name="T2">Task normale:</text:span> il $GPRMB contiene come destinazione il prossimo waypoint di task; l'XTE viene calcolato rispetto alla rotta della leg attiva.</text:p>
      <text:p text:style-name="P9"><text:span text:style-name="T2">Direct To verso fix off-task:</text:span> non appena il countdown conferma il Direct To, il <text:soft-page-break/>$GPRMB commuta immediatamente sul fix come destinazione. L'XTE viene calcolato rispetto alla rotta diretta dalla posizione di attivazione al fix.</text:p>
      <text:p text:style-name="P9"><text:span text:style-name="T2">Ripresa automatica della task:</text:span> al raggiungimento del fix il $GPRMB commuta sul nuovo prossimo waypoint di task. L'XTE viene calcolato dalla posizione del fix verso il nuovo target, garantendo continuita della guida laterale.</text:p>
      <text:p text:style-name="P9"><text:span text:style-name="T2">Direct To verso punto di task:</text:span> il $GPRMB commuta immediatamente sul punto di task selezionato; l'XTE parte dalla posizione di attivazione verso quel pu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keep-with-next="always"/>
      <style:text-properties style:font-name="Tahoma" fo:font-family="Tahoma" style:font-family-generic="roman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keep-with-next="always"/>
      <style:text-properties style:font-name="Tahoma" fo:font-family="Tahoma" style:font-family-generic="roman" style:font-pitch="variable" fo:font-size="14pt" fo:font-style="italic" fo:font-weight="bold" style:font-name-asian="Tahoma1" style:font-family-asian="Tahoma" style:font-family-generic-asian="system" style:font-pitch-asian="variable" style:font-size-asian="14pt" style:font-style-asian="italic" style:font-weight-asian="bold" style:font-name-complex="Tahoma1" style:font-family-complex="Tahom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2pt" fo:font-weight="normal" style:font-name-asian="Noto Sans Symbols" style:font-family-asian="'Noto Sans Symbols'" style:font-family-generic-asian="system" style:font-pitch-asian="variable" style:font-size-asian="12pt" style:font-weight-asian="normal" style:font-name-complex="Noto Sans Symbols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Courier New" fo:font-family="'Courier New'" style:font-family-generic="roman" style:font-pitch="variable" fo:font-size="10pt" fo:font-style="normal" style:text-underline-style="solid" style:text-underline-width="auto" style:text-underline-color="font-color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family-generic="swiss"/>
      </text:list-level-style-bullet>
      <text:list-level-style-bullet text:level="4" text:style-name="ListLabel_20_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family-generic="swiss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family-generic="swiss"/>
      </text:list-level-style-bullet>
      <text:list-level-style-bullet text:level="7" text:style-name="ListLabel_20_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family-generic="swiss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family-generic="swis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family-generic="swiss"/>
      </text:list-level-style-bullet>
      <text:list-level-style-bullet text:level="4" text:style-name="ListLabel_20_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family-generic="swiss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family-generic="swiss"/>
      </text:list-level-style-bullet>
      <text:list-level-style-bullet text:level="7" text:style-name="ListLabel_20_1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family-generic="swiss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family-generic="swis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9.011cm" fo:margin-left="-0.199cm" fo:margin-top="0cm" fo:margin-bottom="0cm" table:align="left"/>
    </style:style>
    <style:style style:name="Table1.A" style:family="table-column">
      <style:table-column-properties style:column-width="16.556cm"/>
    </style:style>
    <style:style style:name="Table1.B" style:family="table-column">
      <style:table-column-properties style:column-width="2.4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Heading_20_1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7cm" fo:margin-bottom="1.27cm" fo:margin-left="1.111cm" fo:margin-right="0.998cm" style:writing-mode="lr-tb" style:layout-grid-color="#c0c0c0" style:layout-grid-lines="27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LK8000 Tactical Flight Computer version 7.2 – Changes from v7.0</text:p>
            </table:table-cell>
            <table:table-cell table:style-name="Table1.B1" office:value-type="string">
              <text:p text:style-name="MP3"><text:span text:style-name="MT1"><text:s text:c="2"/></text:span><text:page-number text:select-page="current">5</text:page-number></text:p>
            </table:table-cell>
          </table:table-row>
        </table:table>
        <text:p text:style-name="MP4"><text:bookmark text:name="_cpu2rxib089e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editing-duration>PT1M16S</meta:editing-duration>
    <meta:editing-cycles>2</meta:editing-cycles>
    <meta:creation-date>2026-06-05T14:07:17.419613809</meta:creation-date>
    <dc:date>2026-06-05T14:15:39.154956452</dc:date>
    <meta:document-statistic meta:table-count="5" meta:image-count="16" meta:object-count="0" meta:page-count="7" meta:paragraph-count="57" meta:word-count="948" meta:character-count="5989" meta:non-whitespace-character-count="5077"/>
  </office:meta>
</office:document-meta>
</file>