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CC0000013F0AF23863.png" manifest:media-type="image/png"/>
  <manifest:file-entry manifest:full-path="Pictures/10000001000001CC0000013FDCC979AE.png" manifest:media-type="image/png"/>
  <manifest:file-entry manifest:full-path="Pictures/1000000100000154000000EC053F792C.png" manifest:media-type="image/png"/>
  <manifest:file-entry manifest:full-path="Pictures/1000000100000154000000EC75E110A4.png" manifest:media-type="image/png"/>
  <manifest:file-entry manifest:full-path="Pictures/1000000100000154000000EC135CAA1B.png" manifest:media-type="image/png"/>
  <manifest:file-entry manifest:full-path="Pictures/1000000100000154000000EC7FF9D569.png" manifest:media-type="image/png"/>
  <manifest:file-entry manifest:full-path="Pictures/1000000100000154000000EC234C5056.png" manifest:media-type="image/png"/>
  <manifest:file-entry manifest:full-path="Pictures/1000000100000154000000ECF03FEA26.png" manifest:media-type="image/png"/>
  <manifest:file-entry manifest:full-path="Pictures/10000001000001CC0000013FE8CDC3D8.png" manifest:media-type="image/png"/>
  <manifest:file-entry manifest:full-path="Pictures/1000000100000154000000ECBD925DFB.png" manifest:media-type="image/png"/>
  <manifest:file-entry manifest:full-path="Pictures/10000001000001CC0000013F426E71F2.png" manifest:media-type="image/png"/>
  <manifest:file-entry manifest:full-path="Pictures/10000001000001CC0000013FBB78BD28.png" manifest:media-type="image/png"/>
  <manifest:file-entry manifest:full-path="Pictures/10000001000001CC0000013FA9D13626.png" manifest:media-type="image/png"/>
  <manifest:file-entry manifest:full-path="Pictures/10000001000001CC0000013F7CACB73D.png" manifest:media-type="image/png"/>
  <manifest:file-entry manifest:full-path="Pictures/1000000100000154000000EC92E4BA06.png" manifest:media-type="image/png"/>
  <manifest:file-entry manifest:full-path="Pictures/1000000100000154000000EC508A9C20.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office="urn:oasis:names:tc:opendocument:xmlns:office:1.0" xmlns:officeooo="http://openoffice.org/2009/office"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la1" style:family="table">
      <style:table-properties style:width="18.891cm" fo:margin-top="0.212cm" fo:margin-bottom="0.212cm" table:align="margins" table:border-model="collapsing"/>
    </style:style>
    <style:style style:name="Tabella1.A" style:family="table-column">
      <style:table-column-properties style:column-width="9.446cm" style:rel-column-width="32767*"/>
    </style:style>
    <style:style style:name="Tabella1.B" style:family="table-column">
      <style:table-column-properties style:column-width="9.446cm" style:rel-column-width="32768*"/>
    </style:style>
    <style:style style:name="Tabella1.A1" style:family="table-cell">
      <style:table-cell-properties fo:padding="0.102cm" fo:border="none"/>
    </style:style>
    <style:style style:name="Tabella2" style:family="table">
      <style:table-properties style:width="18.891cm" fo:margin-top="0.212cm" fo:margin-bottom="0.212cm" table:align="margins" table:border-model="collapsing"/>
    </style:style>
    <style:style style:name="Tabella2.A" style:family="table-column">
      <style:table-column-properties style:column-width="9.446cm" style:rel-column-width="32767*"/>
    </style:style>
    <style:style style:name="Tabella2.B" style:family="table-column">
      <style:table-column-properties style:column-width="9.446cm" style:rel-column-width="32768*"/>
    </style:style>
    <style:style style:name="Tabella2.A1" style:family="table-cell">
      <style:table-cell-properties fo:padding="0.102cm" fo:border="none"/>
    </style:style>
    <style:style style:name="Tabella3" style:family="table">
      <style:table-properties style:width="18.891cm" fo:margin-top="0.212cm" fo:margin-bottom="0.212cm" table:align="margins" table:border-model="collapsing"/>
    </style:style>
    <style:style style:name="Tabella3.A" style:family="table-column">
      <style:table-column-properties style:column-width="9.446cm" style:rel-column-width="32767*"/>
    </style:style>
    <style:style style:name="Tabella3.B" style:family="table-column">
      <style:table-column-properties style:column-width="9.446cm" style:rel-column-width="32768*"/>
    </style:style>
    <style:style style:name="Tabella3.A1" style:family="table-cell">
      <style:table-cell-properties fo:padding="0.102cm" fo:border="none"/>
    </style:style>
    <style:style style:name="Tabella4" style:family="table">
      <style:table-properties style:width="18.891cm" fo:margin-top="0.212cm" fo:margin-bottom="0.212cm" table:align="margins" table:border-model="collapsing"/>
    </style:style>
    <style:style style:name="Tabella4.A" style:family="table-column">
      <style:table-column-properties style:column-width="9.446cm" style:rel-column-width="32767*"/>
    </style:style>
    <style:style style:name="Tabella4.B" style:family="table-column">
      <style:table-column-properties style:column-width="9.446cm" style:rel-column-width="32768*"/>
    </style:style>
    <style:style style:name="Tabella4.A1" style:family="table-cell">
      <style:table-cell-properties fo:padding="0.102cm" fo:border="none"/>
    </style:style>
    <style:style style:name="P1" style:family="paragraph" style:parent-style-name="Heading_20_1">
      <style:paragraph-properties fo:margin-top="0.847cm" fo:margin-bottom="0.212cm" style:contextual-spacing="false" fo:text-align="start" style:justify-single-word="false" fo:orphans="2" fo:widows="2" style:writing-mode="lr-tb"/>
    </style:style>
    <style:style style:name="P2" style:family="paragraph" style:parent-style-name="Standard">
      <style:paragraph-properties fo:margin-top="0cm" fo:margin-bottom="0.212cm" style:contextual-spacing="false" fo:line-height="100%" fo:text-align="start" style:justify-single-word="false"/>
      <style:text-properties fo:font-size="12pt" style:font-size-asian="12pt" style:font-size-complex="12pt"/>
    </style:style>
    <style:style style:name="P3" style:family="paragraph" style:parent-style-name="Heading_20_1">
      <style:paragraph-properties fo:margin-top="0.847cm" fo:margin-bottom="0.212cm" style:contextual-spacing="false" fo:line-height="100%"/>
    </style:style>
    <style:style style:name="P4" style:family="paragraph" style:parent-style-name="Heading_20_2">
      <style:paragraph-properties fo:margin-top="0.423cm" fo:margin-bottom="0.212cm" style:contextual-spacing="false" fo:line-height="100%"/>
    </style:style>
    <style:style style:name="P5" style:family="paragraph" style:parent-style-name="Standard">
      <style:paragraph-properties fo:margin-top="0.212cm" fo:margin-bottom="0.212cm" style:contextual-spacing="false" fo:line-height="100%"/>
    </style:style>
    <style:style style:name="P6" style:family="paragraph" style:parent-style-name="Heading_20_2">
      <style:paragraph-properties fo:margin-top="0.423cm" fo:margin-bottom="0.212cm" style:contextual-spacing="false" fo:line-height="100%"/>
      <style:text-properties fo:font-size="12pt" style:font-size-asian="12pt" style:font-size-complex="12pt"/>
    </style:style>
    <style:style style:name="P7" style:family="paragraph" style:parent-style-name="Heading_20_1">
      <style:paragraph-properties fo:margin-top="0.423cm" fo:margin-bottom="0.212cm" style:contextual-spacing="false" fo:line-height="100%" fo:break-before="page"/>
    </style:style>
    <style:style style:name="P8" style:family="paragraph" style:parent-style-name="Heading_20_2">
      <style:paragraph-properties fo:margin-top="0.423cm" fo:margin-bottom="0.212cm" style:contextual-spacing="false" fo:line-height="100%"/>
      <style:text-properties officeooo:paragraph-rsid="00097556"/>
    </style:style>
    <style:style style:name="P9" style:family="paragraph" style:parent-style-name="Standard">
      <style:paragraph-properties fo:margin-top="0cm" fo:margin-bottom="0.212cm" style:contextual-spacing="false" fo:line-height="100%" fo:text-align="start" style:justify-single-word="false"/>
      <style:text-properties fo:font-size="12pt" officeooo:paragraph-rsid="00097556" style:font-size-asian="12pt" style:font-size-complex="12pt"/>
    </style:style>
    <style:style style:name="T1" style:family="text">
      <style:text-properties fo:font-weight="bold"/>
    </style:style>
    <style:style style:name="T2" style:family="text">
      <style:text-properties fo:font-style="italic" fo:font-weight="bold"/>
    </style:style>
    <style:style style:name="fr1" style:family="graphic" style:parent-style-name="Graphics">
      <style:graphic-properties style:vertical-pos="top" style:vertical-rel="baseline"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neral Aviation DIRECT TO Functions</text:p>
      <text:p text:style-name="P2">The functions described in this document are available <text:span text:style-name="T1">exclusively in GA Aircraft mode</text:span>. To select the aircraft category: <text:span text:style-name="T2">Config (gear icon) → Pilot Configuration → Category → GA Aircraft</text:span>. After changing category LK8000 must be restarted.</text:p>
      <text:p text:style-name="P3">Direct To — Navigation to an Off-Task Fix</text:p>
      <text:p text:style-name="P2">In <text:span text:style-name="T2">GA Aircraft</text:span> mode, LK8000 allows temporarily deviating to a waypoint outside the task without losing the flight plan. This function is called <text:span text:style-name="T2">Direct To</text:span> and works with a <text:span text:style-name="T2">context switching</text:span>: the task is paused, navigation points to the chosen fix, and upon reaching the fix the task resumes automatically from the remaining point closest to the current position.</text:p>
      <text:p text:style-name="P4">The flight plan</text:p>
      <text:p text:style-name="P2">In the example the flight plan follows the route <text:span text:style-name="T2">SIBARI FLY - POLICORO - LAGO LAVELLO - NORTH LUCERA - SAN VITO CHIETI - ROSETO DEGLI ABRUZZI - CIVITANOVA - ANCONA</text:span>, viewable from the Task Overview screen.</text:p>
      <text:p text:style-name="P5"><draw:frame draw:style-name="fr1" draw:name="a10.png" text:anchor-type="as-char" svg:width="8.601cm" svg:height="6.001cm" draw:z-index="0"><draw:image xlink:href="Pictures/10000001000001CC0000013F0AF23863.png" xlink:type="simple" xlink:show="embed" xlink:actuate="onLoad" draw:mime-type="image/png"/></draw:frame></text:p>
      <text:p text:style-name="P4">Task navigation towards POLICORO</text:p>
      <text:p text:style-name="P2">The aircraft departs from SIBARI. The next task waypoint is <text:span text:style-name="T2">POLICORO</text:span>, shown as <text:span text:style-name="T2">T&gt;POLICORO</text:span> with distance 47.8 km, track 24°. The bottom strip shows eHDG, Brg, Dist, NxAvETE and NxAvETA referenced to POLICORO.</text:p>
      <text:p text:style-name="P5"><text:soft-page-break/><draw:frame draw:style-name="fr1" draw:name="a1.png" text:anchor-type="as-char" svg:width="8.601cm" svg:height="6.001cm" draw:z-index="1"><draw:image xlink:href="Pictures/10000001000001CC0000013FBB78BD28.png" xlink:type="simple" xlink:show="embed" xlink:actuate="onLoad" draw:mime-type="image/png"/></draw:frame></text:p>
      <text:p text:style-name="P4">Selecting the off-task waypoint</text:p>
      <text:p text:style-name="P2">The pilot needs to divert to <text:span text:style-name="T2">FALCONE - PZ01</text:span>, an airport not in the task. From the waypoint list filter with <text:span text:style-name="T2">*FAL*</text:span>: select <text:span text:style-name="T2">FALCONE - PZ01</text:span> (155 km, 342°). In the quick window the Goto button (non-GA mode) becomes <text:span text:style-name="T2">Direct To</text:span>.</text:p>
      <table:table table:name="Tabella1" table:style-name="Tabella1">
        <table:table-column table:style-name="Tabella1.A"/>
        <table:table-column table:style-name="Tabella1.B"/>
        <table:table-row>
          <table:table-cell table:style-name="Tabella1.A1" office:value-type="string">
            <text:p text:style-name="P5"><draw:frame draw:style-name="fr1" draw:name="a2.png" text:anchor-type="as-char" svg:width="7.999cm" svg:height="5.6cm" draw:z-index="2"><draw:image xlink:href="Pictures/1000000100000154000000EC053F792C.png" xlink:type="simple" xlink:show="embed" xlink:actuate="onLoad" draw:mime-type="image/png"/></draw:frame></text:p>
          </table:table-cell>
          <table:table-cell table:style-name="Tabella1.A1" office:value-type="string">
            <text:p text:style-name="P5"><draw:frame draw:style-name="fr1" draw:name="a3.png" text:anchor-type="as-char" svg:width="7.999cm" svg:height="5.6cm" draw:z-index="3"><draw:image xlink:href="Pictures/1000000100000154000000EC75E110A4.png" xlink:type="simple" xlink:show="embed" xlink:actuate="onLoad" draw:mime-type="image/png"/></draw:frame></text:p>
          </table:table-cell>
        </table:table-row>
      </table:table>
      <text:p text:style-name="P4">Confirming with the countdown</text:p>
      <text:p text:style-name="P2">Pressing <text:span text:style-name="T2">Direct To</text:span> brings up the confirmation popup with a <text:span text:style-name="T2">10 secondi</text:span>-second countdown and the fix name. The pilot can wait for automatic expiry or press <text:span text:style-name="T2">Cancel</text:span>. The task remains unchanged in memory.</text:p>
      <text:p text:style-name="P5"><draw:frame draw:style-name="fr1" draw:name="a4.png" text:anchor-type="as-char" svg:width="8.601cm" svg:height="6.001cm" draw:z-index="4"><draw:image xlink:href="Pictures/1000000100000154000000EC234C5056.png" xlink:type="simple" xlink:show="embed" xlink:actuate="onLoad" draw:mime-type="image/png"/></draw:frame></text:p>
      <text:p text:style-name="P4"><text:soft-page-break/>Direct To active: navigating to FALCONE</text:p>
      <text:p text:style-name="P2">When the countdown expires navigation switches to <text:span text:style-name="T2">FALCONE - PZ01</text:span>. Top-left now shows <text:span text:style-name="T2">T&gt;FALCONE</text:span>. The bearing line points directly to the fix; the strip shows Dist, NxAvETE and NxAvETA calculated on FALCONE. The task is intact in memory, simply paused.</text:p>
      <text:p text:style-name="P5"><draw:frame draw:style-name="fr1" draw:name="a5.png" text:anchor-type="as-char" svg:width="8.601cm" svg:height="6.001cm" draw:z-index="5"><draw:image xlink:href="Pictures/10000001000001CC0000013FE8CDC3D8.png" xlink:type="simple" xlink:show="embed" xlink:actuate="onLoad" draw:mime-type="image/png"/></draw:frame></text:p>
      <text:p text:style-name="P4">Target window during Direct To</text:p>
      <text:p text:style-name="P2">Opening the <text:span text:style-name="T2">finestra Target</text:span> the panel adapts: the title shows <text:span text:style-name="T2">Direct To: FALCONE</text:span>, the task selector is hidden and the fields <text:span text:style-name="T2">Dist</text:span>, <text:span text:style-name="T2">AvETE</text:span>, <text:span text:style-name="T2">AvETA</text:span> are calculated on FALCONE (148.1 km, 36:20, 07:32). The <text:span text:style-name="T2">Approach</text:span> button is available as FALCONE is a certified airport.</text:p>
      <text:p text:style-name="P5"><draw:frame draw:style-name="fr1" draw:name="a6.png" text:anchor-type="as-char" svg:width="8.601cm" svg:height="6.001cm" draw:z-index="6"><draw:image xlink:href="Pictures/1000000100000154000000EC7FF9D569.png" xlink:type="simple" xlink:show="embed" xlink:actuate="onLoad" draw:mime-type="image/png"/></draw:frame></text:p>
      <text:p text:style-name="P4">Arrival at FALCONE: automatic task resumption</text:p>
      <text:p text:style-name="P2">When the distance to FALCONE drops below the arrival radius, LK8000 identifies the remaining task point <text:span text:style-name="T2">closest to the current position</text:span> and switches navigation to it. In the example POLICORO is automatically skipped because it is farther than <text:span text:style-name="T2">LAGO LAVELLO</text:span>, which becomes the new target.</text:p>
      <table:table table:name="Tabella2" table:style-name="Tabella2">
        <table:table-column table:style-name="Tabella2.A"/>
        <table:table-column table:style-name="Tabella2.B"/>
        <text:soft-page-break/>
        <table:table-row>
          <table:table-cell table:style-name="Tabella2.A1" office:value-type="string">
            <text:p text:style-name="P5"><draw:frame draw:style-name="fr1" draw:name="a7.png" text:anchor-type="as-char" svg:width="7.999cm" svg:height="5.6cm" draw:z-index="7"><draw:image xlink:href="Pictures/10000001000001CC0000013FDCC979AE.png" xlink:type="simple" xlink:show="embed" xlink:actuate="onLoad" draw:mime-type="image/png"/></draw:frame></text:p>
          </table:table-cell>
          <table:table-cell table:style-name="Tabella2.A1" office:value-type="string">
            <text:p text:style-name="P5"><draw:frame draw:style-name="fr1" draw:name="a8.png" text:anchor-type="as-char" svg:width="7.999cm" svg:height="5.6cm" draw:z-index="8"><draw:image xlink:href="Pictures/1000000100000154000000ECBD925DFB.png" xlink:type="simple" xlink:show="embed" xlink:actuate="onLoad" draw:mime-type="image/png"/></draw:frame></text:p>
          </table:table-cell>
        </table:table-row>
      </table:table>
      <text:p text:style-name="P4">Continuing towards LAGO LAVELLO</text:p>
      <text:p text:style-name="P2">The task continues normally towards <text:span text:style-name="T2">LAGO LAVELLO</text:span> with distance 10.8 km, track 280° and NxAvETE 02:39. All subsequent points remain in sequence.</text:p>
      <text:p text:style-name="P5"><draw:frame draw:style-name="fr1" draw:name="a9.png" text:anchor-type="as-char" svg:width="8.601cm" svg:height="6.001cm" draw:z-index="9"><draw:image xlink:href="Pictures/10000001000001CC0000013FA9D13626.png" xlink:type="simple" xlink:show="embed" xlink:actuate="onLoad" draw:mime-type="image/png"/></draw:frame></text:p>
      <text:p text:style-name="P6"/>
      <text:p text:style-name="P7">Direct To — Skip to a Task Point</text:p>
      <text:p text:style-name="P2">In addition to deviating to off-task fixes, the <text:span text:style-name="T2">Direct To</text:span> function allows jumping directly to any remaining task point, activated from the <text:span text:style-name="T2">finestra Target</text:span>.</text:p>
      <text:p text:style-name="P2"><text:span text:style-name="T2">Pilot’s own decision:</text:span> the pilot decides to skip intermediate waypoints to optimise the route based on weather, fuel or time available.</text:p>
      <text:p text:style-name="P2"><text:span text:style-name="T2">ATC instruction:</text:span> the controller asks “Are you able to proceed direct to [waypoint]?” and the pilot must set the new target in a few seconds without leaving the flight screen.</text:p>
      <text:p text:style-name="P4">Task navigation towards NORTH LUCERA</text:p>
      <text:p text:style-name="P2">The pilot is flying towards <text:span text:style-name="T2">NORTH LUCERA</text:span> (T&gt;NORTH LUC, 25.1 km, Brg 317°, NxAvETE 06:18, NxAvETA 07:21). In the task SAN VITO CHIETI and ROSETO DEGLI ABRUZZI follow.</text:p>
      <text:p text:style-name="P5"><draw:frame draw:style-name="fr1" draw:name="b1.png" text:anchor-type="as-char" svg:width="8.601cm" svg:height="6.001cm" draw:z-index="10"><draw:image xlink:href="Pictures/10000001000001CC0000013F7CACB73D.png" xlink:type="simple" xlink:show="embed" xlink:actuate="onLoad" draw:mime-type="image/png"/></draw:frame></text:p>
      <text:p text:style-name="P4">Selecting the task point from the Target window</text:p>
      <text:p text:style-name="P2">The pilot opens the <text:span text:style-name="T2">finestra Target</text:span>. The panel shows the active point: <text:span text:style-name="T2">Tp 3 NORTH LUCERA</text:span>, Dist 24.0 km, AvETE 06:01, AvETA 07:21. Using the <text:span text:style-name="T2">&gt;</text:span> button the pilot advances to <text:span text:style-name="T2">Tp 5 ROSETO DEGLI ABRUZZI</text:span>, skipping Tp 4 SAN VITO CHIETI. As soon as the selected point differs from the active task point the <text:span text:style-name="T2">Direct To</text:span> button appears and the map centres on ROSETO (Dist 185.5 km, AvETE 46:35).</text:p>
      <table:table table:name="Tabella3" table:style-name="Tabella3">
        <table:table-column table:style-name="Tabella3.A"/>
        <table:table-column table:style-name="Tabella3.B"/>
        <table:table-row>
          <table:table-cell table:style-name="Tabella3.A1" office:value-type="string">
            <text:p text:style-name="P5"><draw:frame draw:style-name="fr1" draw:name="b2.png" text:anchor-type="as-char" svg:width="7.999cm" svg:height="5.6cm" draw:z-index="11"><draw:image xlink:href="Pictures/1000000100000154000000EC92E4BA06.png" xlink:type="simple" xlink:show="embed" xlink:actuate="onLoad" draw:mime-type="image/png"/></draw:frame></text:p>
          </table:table-cell>
          <table:table-cell table:style-name="Tabella3.A1" office:value-type="string">
            <text:p text:style-name="P5"><draw:frame draw:style-name="fr1" draw:name="b3.png" text:anchor-type="as-char" svg:width="7.999cm" svg:height="5.6cm" draw:z-index="12"><draw:image xlink:href="Pictures/1000000100000154000000EC508A9C20.png" xlink:type="simple" xlink:show="embed" xlink:actuate="onLoad" draw:mime-type="image/png"/></draw:frame></text:p>
          </table:table-cell>
        </table:table-row>
      </table:table>
      <text:p text:style-name="P4"><text:soft-page-break/>Confirming with the countdown</text:p>
      <text:p text:style-name="P2">Pressing <text:span text:style-name="T2">Direct To</text:span> brings up the popup <text:span text:style-name="T2">Direct to: ROSETO DEGLI ABRUZZI / 7</text:span>. When the countdown ends <text:span text:style-name="T2">ActiveTaskPoint advances to Tp 5</text:span>: NORTH LUCERA and SAN VITO CHIETI are skipped and navigation switches to ROSETO DEGLI ABRUZZI.</text:p>
      <text:p text:style-name="P5"><draw:frame draw:style-name="fr1" draw:name="b4.png" text:anchor-type="as-char" svg:width="8.601cm" svg:height="6.001cm" draw:z-index="13"><draw:image xlink:href="Pictures/10000001000001CC0000013F426E71F2.png" xlink:type="simple" xlink:show="embed" xlink:actuate="onLoad" draw:mime-type="image/png"/></draw:frame></text:p>
      <text:p text:style-name="P4">Direct To confirmed: navigating to ROSETO</text:p>
      <text:p text:style-name="P2">Navigation switches to <text:span text:style-name="T2">ROSETO DEGLI ABRUZZI</text:span> (T&gt;ROSETO DE..., 182 km, Brg 321°, NxAvETE 45:46). The bearing line points directly to ROSETO. Re-opening the finestra Target the title remains <text:span text:style-name="T2">Target</text:span> — not Direct To: … as in the off-task case — because the point is already in the task and ActiveTaskPoint has simply advanced to Tp 5 (Dist 181.0 km, AvETE 45:27, AvETA 08:02).</text:p>
      <table:table table:name="Tabella4" table:style-name="Tabella4">
        <table:table-column table:style-name="Tabella4.A"/>
        <table:table-column table:style-name="Tabella4.B"/>
        <table:table-row>
          <table:table-cell table:style-name="Tabella4.A1" office:value-type="string">
            <text:p text:style-name="P5"><draw:frame draw:style-name="fr1" draw:name="b5.png" text:anchor-type="as-char" svg:width="7.999cm" svg:height="5.6cm" draw:z-index="14"><draw:image xlink:href="Pictures/1000000100000154000000EC135CAA1B.png" xlink:type="simple" xlink:show="embed" xlink:actuate="onLoad" draw:mime-type="image/png"/></draw:frame></text:p>
          </table:table-cell>
          <table:table-cell table:style-name="Tabella4.A1" office:value-type="string">
            <text:p text:style-name="P5"><draw:frame draw:style-name="fr1" draw:name="b6.png" text:anchor-type="as-char" svg:width="7.999cm" svg:height="5.6cm" draw:z-index="15"><draw:image xlink:href="Pictures/1000000100000154000000ECF03FEA26.png" xlink:type="simple" xlink:show="embed" xlink:actuate="onLoad" draw:mime-type="image/png"/></draw:frame></text:p>
          </table:table-cell>
        </table:table-row>
      </table:table>
      <text:p text:style-name="P8">Note — Effects on the LK8000 Generic Autopilot Driver</text:p>
      <text:p text:style-name="P9">Le manovre Direct To descritte in questo capitolo agiscono direttamente sul driver <text:span text:style-name="T2">Generic Autopilot</text:span> driver, which generates the <text:span text:style-name="T2">NMEA $GPRMB</text:span> NMEA messages transmitted to the connected autopilot.</text:p>
      <text:p text:style-name="P9"><text:span text:style-name="T1">NB:</text:span> the pilot does not need to change any settings on the autopilot during these manoeuvres. LK8000 automatically updates destination and XTE at the time of Direct To and at the time of task resumption.</text:p>
      <text:p text:style-name="P9"><text:span text:style-name="T2">Normal task:</text:span> $GPRMB contains the next task waypoint as destination; XTE is calculated relative to the active leg track.</text:p>
      <text:p text:style-name="P9"><text:span text:style-name="T2">Direct To towards off-task fix:</text:span> non appena il countdown conferma il Direct To, il <text:soft-page-break/>$GPRMB commuta immediatamente sul fix come destinazione. L'XTE viene calcolato rispetto alla rotta diretta dalla posizione di attivazione al fix.</text:p>
      <text:p text:style-name="P9"><text:span text:style-name="T2">Automatic task resumption:</text:span> upon reaching the fix $GPRMB switches to the new next task waypoint. XTE is calculated from the fix position towards the new target, ensuring continuity of lateral guidance.</text:p>
      <text:p text:style-name="P9"><text:span text:style-name="T2">Direct To towards task point:</text:span> $GPRMB immediately switches to the selected task point; XTE starts from the activation position towards that poi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423cm" fo:margin-bottom="0.212cm" style:contextual-spacing="false" fo:line-height="100%" fo:keep-with-next="always"/>
      <style:text-properties style:font-name="Tahoma" fo:font-family="Tahoma" style:font-family-generic="roman" style:font-pitch="variable" fo:font-size="16pt" fo:font-weight="bold" style:font-name-asian="Tahoma1" style:font-family-asian="Tahoma" style:font-family-generic-asian="system" style:font-pitch-asian="variable" style:font-size-asian="16pt"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normal" style:next-style-name="Standard" style:default-outline-level="" style:class="chapter">
      <style:paragraph-properties fo:margin-top="0.423cm" fo:margin-bottom="0.212cm" style:contextual-spacing="false" fo:line-height="100%" fo:keep-with-next="always"/>
      <style:text-properties style:font-name="Tahoma" fo:font-family="Tahoma" style:font-family-generic="roman" style:font-pitch="variable" fo:font-size="14pt" fo:font-style="italic" fo:font-weight="bold" style:font-name-asian="Tahoma1" style:font-family-asian="Tahoma" style:font-family-generic-asian="system" style:font-pitch-asian="variable" style:font-size-asian="14pt" style:font-style-asian="italic" style:font-weight-asian="bold" style:font-name-complex="Tahoma1" style:font-family-complex="Tahoma" style:font-family-generic-complex="system" style:font-pitch-complex="variable" style:font-size-complex="14pt"/>
    </style:style>
    <style:style style:name="Heading_20_3" style:display-name="Heading 3" style:family="paragraph" style:parent-style-name="normal" style:next-style-name="Standard" style:default-outline-level="" style:class="chapter">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chapter">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chapter">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chapter">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font-size-complex="12pt"/>
    </style:style>
    <style:style style:name="ListLabel_20_2" style:display-name="ListLabel 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 style:display-name="ListLabel 13" style:family="text">
      <style:text-properties fo:font-variant="normal" fo:text-transform="none" fo:color="#000080" loext:opacity="100%" style:text-line-through-style="none" style:text-line-through-type="none" style:text-position="0% 100%" style:font-name="Courier New" fo:font-family="'Courier New'" style:font-family-generic="roman" style:font-pitch="variable" fo:font-size="10pt" fo:font-style="normal" style:text-underline-style="solid" style:text-underline-width="auto" style:text-underline-color="font-color"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family-generic="swiss"/>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family-generic="swiss"/>
      </text:list-level-style-bullet>
      <text:list-level-style-bullet text:level="4" text:style-name="ListLabel_20_3"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family-generic="swiss"/>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family-generic="swiss"/>
      </text:list-level-style-bullet>
      <text:list-level-style-bullet text:level="7" text:style-name="ListLabel_20_5"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family-generic="swiss"/>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family-generic="swis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7"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family-generic="swiss"/>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family-generic="swiss"/>
      </text:list-level-style-bullet>
      <text:list-level-style-bullet text:level="4" text:style-name="ListLabel_20_9"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family-generic="swiss"/>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family-generic="swiss"/>
      </text:list-level-style-bullet>
      <text:list-level-style-bullet text:level="7" text:style-name="ListLabel_20_11"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family-generic="swiss"/>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family-generic="swis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9.011cm" fo:margin-left="-0.199cm" fo:margin-top="0cm" fo:margin-bottom="0cm" table:align="left"/>
    </style:style>
    <style:style style:name="Table1.A" style:family="table-column">
      <style:table-column-properties style:column-width="16.556cm"/>
    </style:style>
    <style:style style:name="Table1.B" style:family="table-column">
      <style:table-column-properties style:column-width="2.455cm"/>
    </style:style>
    <style:style style:name="Table1.1" style:family="table-row">
      <style:table-row-properties fo:keep-together="auto"/>
    </style:style>
    <style:style style:name="Table1.A1" style:family="table-cell">
      <style:table-cell-properties fo:padding-left="0.199cm" fo:padding-right="0.191cm" fo:padding-top="0cm" fo:padding-bottom="0cm" fo:border-left="0.5pt solid #000000" fo:border-right="none" fo:border-top="0.5pt solid #000000" fo:border-bottom="0.5pt solid #000000"/>
    </style:style>
    <style:style style:name="Table1.B1" style:family="table-cell">
      <style:table-cell-properties fo:padding-left="0.199cm" fo:padding-right="0.191cm" fo:padding-top="0cm" fo:padding-bottom="0cm" fo:border-left="none" fo:border-right="0.5pt solid #000000" fo:border-top="0.5pt solid #000000" fo:border-bottom="0.5pt solid #000000"/>
    </style:style>
    <style:style style:name="M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style>
    <style:style style:name="MP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ab-stops>
          <style:tab-stop style:position="8.5cm" style:type="center"/>
          <style:tab-stop style:position="17cm" style:type="right"/>
        </style:tab-stops>
      </style:paragraph-properties>
      <style:text-properties fo:font-variant="normal" fo:text-transform="none" fo:color="#000000" loext:opacity="100%" style:text-line-through-style="none" style:text-line-through-type="none" style:text-position="0% 100%" style:font-name="Tahoma" fo:font-size="11pt" fo:font-style="normal" style:text-underline-style="none" fo:font-weight="normal" style:font-name-asian="Tahoma1" style:font-size-asian="11pt" style:font-style-asian="normal" style:font-weight-asian="normal" style:font-name-complex="Tahoma1" style:font-size-complex="11pt"/>
    </style:style>
    <style:style style:name="MP3"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ab-stops>
          <style:tab-stop style:position="8.5cm" style:type="center"/>
          <style:tab-stop style:position="17cm" style:type="right"/>
        </style:tab-stops>
      </style:paragraph-properties>
    </style:style>
    <style:style style:name="MP4" style:family="paragraph" style:parent-style-name="Heading_20_1">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T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21.001cm" fo:page-height="29.7cm" style:num-format="1" style:print-orientation="portrait" fo:margin-top="1.27cm" fo:margin-bottom="1.27cm" fo:margin-left="1.111cm" fo:margin-right="0.998cm" style:writing-mode="lr-tb" style:layout-grid-color="#c0c0c0" style:layout-grid-lines="2743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able:table table:name="Table1" table:style-name="Table1">
          <table:table-column table:style-name="Table1.A"/>
          <table:table-column table:style-name="Table1.B"/>
          <table:table-row table:style-name="Table1.1">
            <table:table-cell table:style-name="Table1.A1" office:value-type="string">
              <text:p text:style-name="MP2">LK8000 Tactical Flight Computer version 7.2 – Changes from v7.0</text:p>
            </table:table-cell>
            <table:table-cell table:style-name="Table1.B1" office:value-type="string">
              <text:p text:style-name="MP3"><text:span text:style-name="MT1"><text:s text:c="2"/></text:span><text:page-number text:select-page="current">5</text:page-number></text:p>
            </table:table-cell>
          </table:table-row>
        </table:table>
        <text:p text:style-name="MP4"><text:bookmark text:name="_cpu2rxib089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meta:editing-duration>PT1M16S</meta:editing-duration>
    <meta:editing-cycles>2</meta:editing-cycles>
    <meta:creation-date>2026-06-05T14:07:17.419613809</meta:creation-date>
    <dc:date>2026-06-05T14:15:39.154956452</dc:date>
    <meta:document-statistic meta:table-count="5" meta:image-count="16" meta:object-count="0" meta:page-count="7" meta:paragraph-count="57" meta:word-count="948" meta:character-count="5989" meta:non-whitespace-character-count="5077"/>
  </office:meta>
</office:document-meta>
</file>