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C0000013F0AF23863.png" manifest:media-type="image/png"/>
  <manifest:file-entry manifest:full-path="Pictures/10000001000001CC0000013FDCC979AE.png" manifest:media-type="image/png"/>
  <manifest:file-entry manifest:full-path="Pictures/1000000100000154000000EC053F792C.png" manifest:media-type="image/png"/>
  <manifest:file-entry manifest:full-path="Pictures/1000000100000154000000EC75E110A4.png" manifest:media-type="image/png"/>
  <manifest:file-entry manifest:full-path="Pictures/1000000100000154000000EC135CAA1B.png" manifest:media-type="image/png"/>
  <manifest:file-entry manifest:full-path="Pictures/1000000100000154000000EC7FF9D569.png" manifest:media-type="image/png"/>
  <manifest:file-entry manifest:full-path="Pictures/10000001000003260000022D8CDDB664.png" manifest:media-type="image/png"/>
  <manifest:file-entry manifest:full-path="Pictures/10000001000001CC0000013FBB78BD28.png" manifest:media-type="image/png"/>
  <manifest:file-entry manifest:full-path="Pictures/10000001000001CC0000013FA9D13626.png" manifest:media-type="image/png"/>
  <manifest:file-entry manifest:full-path="Pictures/1000000100000154000000ECF03FEA26.png" manifest:media-type="image/png"/>
  <manifest:file-entry manifest:full-path="Pictures/10000001000003260000022D821E3D37.png" manifest:media-type="image/png"/>
  <manifest:file-entry manifest:full-path="Pictures/10000001000001CC0000013FE8CDC3D8.png" manifest:media-type="image/png"/>
  <manifest:file-entry manifest:full-path="Pictures/1000000100000154000000ECBD925DFB.png" manifest:media-type="image/png"/>
  <manifest:file-entry manifest:full-path="Pictures/10000001000003260000022D9D199BE9.png" manifest:media-type="image/png"/>
  <manifest:file-entry manifest:full-path="Pictures/10000001000003260000022DF457D93D.png" manifest:media-type="image/png"/>
  <manifest:file-entry manifest:full-path="Pictures/10000001000003260000022DC5757E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 style:font-family-generic="roman" style:font-pitch="variable"/>
    <style:font-face style:name="Arial1" svg:font-family="Arial, sans-serif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14.986cm" fo:margin-left="0cm" fo:margin-top="0cm" fo:margin-bottom="0cm" table:align="left" style:writing-mode="page"/>
    </style:style>
    <style:style style:name="Tabella1.A" style:family="table-column">
      <style:table-column-properties style:column-width="7.377cm"/>
    </style:style>
    <style:style style:name="Tabella1.B" style:family="table-column">
      <style:table-column-properties style:column-width="7.608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="0cm" fo:border="none"/>
    </style:style>
    <style:style style:name="Tabella2" style:family="table">
      <style:table-properties style:width="14.986cm" fo:margin-left="0cm" fo:margin-top="0cm" fo:margin-bottom="0cm" table:align="left" style:writing-mode="page"/>
    </style:style>
    <style:style style:name="Tabella2.A" style:family="table-column">
      <style:table-column-properties style:column-width="7.377cm"/>
    </style:style>
    <style:style style:name="Tabella2.B" style:family="table-column">
      <style:table-column-properties style:column-width="7.608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padding="0cm" fo:border="none"/>
    </style:style>
    <style:style style:name="Tabella3" style:family="table">
      <style:table-properties style:width="14.986cm" fo:margin-left="0cm" fo:margin-top="0cm" fo:margin-bottom="0cm" table:align="left" style:writing-mode="page"/>
    </style:style>
    <style:style style:name="Tabella3.A" style:family="table-column">
      <style:table-column-properties style:column-width="7.377cm"/>
    </style:style>
    <style:style style:name="Tabella3.B" style:family="table-column">
      <style:table-column-properties style:column-width="7.608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top="0.423cm" fo:margin-bottom="0.282cm" style:contextual-spacing="false" fo:text-align="start" style:justify-single-word="false" style:writing-mode="lr-tb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</style:style>
    <style:style style:name="P3" style:family="paragraph" style:parent-style-name="Heading_20_2" style:list-style-name="">
      <style:paragraph-properties fo:margin-left="2.499cm" fo:margin-right="2.499cm" fo:margin-top="0.706cm" fo:margin-bottom="0.212cm" style:contextual-spacing="false" fo:text-align="start" style:justify-single-word="false" fo:text-indent="0cm" style:auto-text-indent="false" style:writing-mode="lr-tb"/>
    </style:style>
    <style:style style:name="P4" style:family="paragraph" style:parent-style-name="Text_20_body">
      <style:paragraph-properties fo:margin-left="0.176cm" fo:margin-right="0.176cm" fo:margin-top="0.176cm" fo:margin-bottom="0.176cm" style:contextual-spacing="false" fo:line-height="145%" fo:text-align="justify" style:justify-single-word="false" style:writing-mode="lr-tb"/>
    </style:style>
    <style:style style:name="P5" style:family="paragraph" style:parent-style-name="Contenuto_20_tabella">
      <style:paragraph-properties fo:margin-left="0cm" fo:margin-right="0cm" fo:margin-top="0.176cm" fo:margin-bottom="0.176cm" style:contextual-spacing="false" fo:text-indent="0cm" style:auto-text-indent="false" style:writing-mode="lr-tb"/>
    </style:style>
    <style:style style:name="P6" style:family="paragraph" style:parent-style-name="Contenuto_20_tabella">
      <style:paragraph-properties fo:margin-top="0.176cm" fo:margin-bottom="0.176cm" style:contextual-spacing="false" style:writing-mode="lr-tb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margin-top="1.058cm" fo:margin-bottom="0.176cm" style:contextual-spacing="false" fo:text-indent="0cm" style:auto-text-indent="false" fo:padding-left="0cm" fo:padding-right="0cm" fo:padding-top="0.141cm" fo:padding-bottom="0cm" fo:border-left="none" fo:border-right="none" fo:border-top="0.26pt solid #aaaaaa" fo:border-bottom="none" style:writing-mode="lr-tb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font-style="normal" fo:font-weight="bold" style:font-style-asian="normal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color="#555555" loext:opacity="100%" fo:font-size="8.5pt" style:font-size-asian="8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rect To — Navigazione verso un Fix Off-Task</text:p>
      <text:p text:style-name="P2">In modalità <text:span text:style-name="T1">GA Aircraft</text:span>, LK8000 consente di deviare temporaneamente verso un waypoint esterno alla task senza perdere il piano di volo. Questa funzione si chiama <text:span text:style-name="T1">Direct To</text:span> e funziona con un meccanismo di <text:span text:style-name="T1">context switching</text:span>: la task viene messa in pausa, la navigazione punta al fix scelto e al raggiungimento del fix la task riprende automaticamente dal primo waypoint logicamente avanti nella rotta — non il punto geometricamente più vicino.</text:p>
      <text:h text:style-name="P3" text:outline-level="2">Il piano di volo</text:h>
      <text:p text:style-name="P2">Nell'esempio che segue il piano di volo prevede la rotta <text:span text:style-name="T1">SIBARI FLY → POLICORO → LAGO LAVELLO → NORTH LUCERA → SAN VITO CHIETI → ROSETO DEGLI ABRUZZI → CIVITANOVA → ANCONA</text:span>, consultabile dalla schermata Task Overview.</text:p>
      <text:p text:style-name="P4"><draw:frame draw:style-name="fr1" draw:name="Immagine1" text:anchor-type="as-char" svg:width="8.999cm" svg:height="6.2cm" draw:z-index="0"><draw:image xlink:href="Pictures/10000001000001CC0000013F0AF23863.png" xlink:type="simple" xlink:show="embed" xlink:actuate="onLoad" draw:mime-type="image/png"/></draw:frame></text:p>
      <text:h text:style-name="P3" text:outline-level="2">Navigazione in task verso POLICORO</text:h>
      <text:p text:style-name="P2">L'aereo parte da SIBARI. Il prossimo waypoint di task è <text:span text:style-name="T1">POLICORO</text:span>, mostrato in alto a sinistra come <text:span text:style-name="T1">T&gt;POLICORO</text:span> con distanza 47.8 km e rotta 24°. La strip inferiore riporta eHDG, Brg, Dist, NxAvETE e NxAvETA — tutti riferiti a POLICORO.</text:p>
      <text:p text:style-name="P4"><draw:frame draw:style-name="fr1" draw:name="Immagine2" text:anchor-type="as-char" svg:width="8.999cm" svg:height="6.2cm" draw:z-index="1"><draw:image xlink:href="Pictures/10000001000001CC0000013FBB78BD28.png" xlink:type="simple" xlink:show="embed" xlink:actuate="onLoad" draw:mime-type="image/png"/></draw:frame></text:p>
      <text:h text:style-name="P3" text:outline-level="2">Selezione del waypoint off-task</text:h>
      <text:p text:style-name="P2">Il pilota deve deviare verso <text:span text:style-name="T1">FALCONE - PZ01</text:span>, aeroporto non presente nella task. Dalla lista waypoint si <text:soft-page-break/>filtra con il testo <text:span text:style-name="T1">*FAL*</text:span>: LK8000 mostra tutti i waypoint corrispondenti con distanza e rilevamento. Si seleziona <text:span text:style-name="T1">FALCONE - PZ01</text:span> (155 km, 342°): nella finestra rapida del waypoint il pulsante "Goto" della modalità non-GA diventa <text:span text:style-name="T1">Direct To</text:span>.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5"><draw:frame draw:style-name="fr1" draw:name="Immagine3" text:anchor-type="as-char" svg:width="7.2cm" svg:height="5.001cm" draw:z-index="2"><draw:image xlink:href="Pictures/1000000100000154000000EC053F792C.png" xlink:type="simple" xlink:show="embed" xlink:actuate="onLoad" draw:mime-type="image/png"/><svg:desc>Ricerca FAL</svg:desc></draw:frame></text:p>
          </table:table-cell>
          <table:table-cell table:style-name="Tabella1.A1" office:value-type="string">
            <text:p text:style-name="P6"><draw:frame draw:style-name="fr1" draw:name="Immagine4" text:anchor-type="as-char" svg:width="7.2cm" svg:height="5.001cm" draw:z-index="3"><draw:image xlink:href="Pictures/1000000100000154000000EC75E110A4.png" xlink:type="simple" xlink:show="embed" xlink:actuate="onLoad" draw:mime-type="image/png"/><svg:desc>Finestra rapida</svg:desc></draw:frame></text:p>
          </table:table-cell>
        </table:table-row>
      </table:table>
      <text:h text:style-name="P3" text:outline-level="2">Conferma con il countdown</text:h>
      <text:p text:style-name="P2"><text:span text:style-name="T2">Premendo </text:span><text:span text:style-name="T3">Direct To</text:span><text:span text:style-name="T2"> appare il popup di conferma con un countdown di </text:span><text:span text:style-name="T3">10 secondi</text:span><text:span text:style-name="T2"> e il nome del fix. Il popup mostra rotta (BRG) e distanza (DIST) al fix dalla posizione attuale, insieme a stima del tempo en-route (ETE) e orario stimato di arrivo (ETA). Il pilota può attendere la scadenza automatica oppure premere </text:span><text:span text:style-name="T3">Cancel</text:span><text:span text:style-name="T2">. La task rimane invariata in memoria. L'autopilota rimane sul target precedente per tutta la durata del countdown: si attiva sul nuovo fix solo alla conferma.</text:span></text:p>
      <text:p text:style-name="P4"><draw:frame draw:style-name="fr1" draw:name="Immagine5" text:anchor-type="as-char" svg:width="8.999cm" svg:height="6.2cm" draw:z-index="4"><draw:image xlink:href="Pictures/10000001000003260000022D8CDDB664.png" xlink:type="simple" xlink:show="embed" xlink:actuate="onLoad" draw:mime-type="image/png"/></draw:frame></text:p>
      <text:h text:style-name="P3" text:outline-level="2">Direct To attivo: navigazione verso FALCONE</text:h>
      <text:p text:style-name="P2">Allo scadere del countdown tutta la navigazione commuta su <text:span text:style-name="T1">FALCONE - PZ01</text:span>. In alto a sinistra compare <text:span text:style-name="T1">T&gt;FALCONE</text:span>. La linea di bearing sulla mappa punta direttamente al fix e la strip in basso riporta Dist, NxAvETE e NxAvETA calcolati su FALCONE. La task è integra in memoria, semplicemente in pausa.</text:p>
      <text:p text:style-name="P4"><text:soft-page-break/><draw:frame draw:style-name="fr1" draw:name="Immagine6" text:anchor-type="as-char" svg:width="8.999cm" svg:height="6.2cm" draw:z-index="5"><draw:image xlink:href="Pictures/10000001000001CC0000013FE8CDC3D8.png" xlink:type="simple" xlink:show="embed" xlink:actuate="onLoad" draw:mime-type="image/png"/></draw:frame></text:p>
      <text:h text:style-name="P3" text:outline-level="2">Finestra Target durante il Direct To</text:h>
      <text:p text:style-name="P2">Aprendo la <text:span text:style-name="T1">finestra Target</text:span> durante un Direct To off-task il pannello si adatta automaticamente: il titolo mostra <text:span text:style-name="T1">Direct To: FALCONE</text:span>, il selettore dei punti di task è nascosto e i campi <text:span text:style-name="T1">Dist</text:span>, <text:span text:style-name="T1">AvETE</text:span> e <text:span text:style-name="T1">AvETA</text:span> sono calcolati su FALCONE (148.1 km, 36:20, 07:32). Il pulsante <text:span text:style-name="T1">Approach</text:span> è disponibile in quanto FALCONE è un aeroporto certificato. La mappa è centrata sul fix.</text:p>
      <text:p text:style-name="P4"><draw:frame draw:style-name="fr1" draw:name="Immagine7" text:anchor-type="as-char" svg:width="8.999cm" svg:height="6.2cm" draw:z-index="6"><draw:image xlink:href="Pictures/1000000100000154000000EC7FF9D569.png" xlink:type="simple" xlink:show="embed" xlink:actuate="onLoad" draw:mime-type="image/png"/></draw:frame></text:p>
      <text:h text:style-name="P3" text:outline-level="2">Arrivo a FALCONE: ripresa automatica della task</text:h>
      <text:p text:style-name="P2">Quando la distanza da FALCONE scende sotto il raggio di arrivo configurato (1000 m), LK8000 seleziona automaticamente il <text:span text:style-name="T4">primo waypoint di task logicamente avanti nella rotta</text:span> — non il punto geometricamente più vicino. L'algoritmo confronta la direzione della leg in arrivo a ciascun waypoint con il vettore fisso→posizione aereo: se la posizione è nel semipiano "avanti", quel waypoint è già superato e viene saltato. In questo modo, se l'aereo si trova vicino a LAGO LAVELLO durante la deviazione, la task riprende da LAGO LAVELLO e non da POLICORO che è già alle spalle.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5"><draw:frame draw:style-name="fr1" draw:name="Immagine8" text:anchor-type="as-char" svg:width="7.2cm" svg:height="5.001cm" draw:z-index="7"><draw:image xlink:href="Pictures/10000001000001CC0000013FDCC979AE.png" xlink:type="simple" xlink:show="embed" xlink:actuate="onLoad" draw:mime-type="image/png"/><svg:desc>Ripresa task</svg:desc></draw:frame></text:p>
          </table:table-cell>
          <table:table-cell table:style-name="Tabella2.A1" office:value-type="string">
            <text:p text:style-name="P6"><draw:frame draw:style-name="fr1" draw:name="Immagine9" text:anchor-type="as-char" svg:width="7.2cm" svg:height="5.001cm" draw:z-index="8"><draw:image xlink:href="Pictures/1000000100000154000000ECBD925DFB.png" xlink:type="simple" xlink:show="embed" xlink:actuate="onLoad" draw:mime-type="image/png"/><svg:desc>Finestra Target normale</svg:desc></draw:frame><text:soft-page-break/></text:p>
          </table:table-cell>
        </table:table-row>
      </table:table>
      <text:h text:style-name="P3" text:outline-level="2">Proseguimento verso LAGO LAVELLO</text:h>
      <text:p text:style-name="P2">La task prosegue normalmente verso <text:span text:style-name="T1">LAGO LAVELLO</text:span> con distanza 10.8 km, rotta 280° e NxAvETE 02:39. Tutti i punti successivi della task rimangono in sequenza.</text:p>
      <text:p text:style-name="P4"><draw:frame draw:style-name="fr1" draw:name="Immagine10" text:anchor-type="as-char" svg:width="8.999cm" svg:height="6.2cm" draw:z-index="9"><draw:image xlink:href="Pictures/10000001000001CC0000013FA9D13626.png" xlink:type="simple" xlink:show="embed" xlink:actuate="onLoad" draw:mime-type="image/png"/></draw:frame></text:p>
      <text:p text:style-name="P1">Direct To — Salto a un Punto della Task</text:p>
      <text:p text:style-name="P2">Oltre alla deviazione verso fix off-task, la funzione <text:span text:style-name="T1">Direct To</text:span> consente di saltare direttamente a qualsiasi punto della task ancora da percorrere. Questa modalità si attiva dalla <text:span text:style-name="T1">finestra Target</text:span> ed è utile in due situazioni tipiche.</text:p>
      <text:p text:style-name="P2"><text:span text:style-name="T1">Decisione autonoma del pilota:</text:span> si decide di saltare uno o più waypoint intermedi per ottimizzare la rotta in base a condizioni meteo, consumo carburante o tempo disponibile.</text:p>
      <text:p text:style-name="P2"><text:span text:style-name="T1">Istruzione ATC:</text:span> l'ente chiede "Siete abili a procedere diretto [waypoint]?" e il pilota deve impostare il nuovo target in pochi secondi senza uscire dalla schermata di volo.</text:p>
      <text:h text:style-name="P3" text:outline-level="2">Navigazione in task verso NORTH LUCERA</text:h>
      <text:p text:style-name="P2">Il pilota sta volando verso <text:span text:style-name="T1">NORTH LUCERA</text:span> (T&gt;NORTH LUC, 25.1 km, Brg 317°, NxAvETE 06:18, NxAvETA 07:21). Nella task seguono ancora SAN VITO CHIETI e ROSETO DEGLI ABRUZZI.</text:p>
      <text:p text:style-name="P4"><draw:frame draw:style-name="fr1" draw:name="Immagine11" text:anchor-type="as-char" svg:width="8.999cm" svg:height="6.2cm" draw:z-index="10"><draw:image xlink:href="Pictures/10000001000003260000022D9D199BE9.png" xlink:type="simple" xlink:show="embed" xlink:actuate="onLoad" draw:mime-type="image/png"/></draw:frame></text:p>
      <text:h text:style-name="P3" text:outline-level="2"><text:soft-page-break/>Selezione del punto di task dalla finestra Target</text:h>
      <text:p text:style-name="P2">Il pilota apre la <text:span text:style-name="T1">finestra Target</text:span>. Il pannello mostra il punto attivo: <text:span text:style-name="T4">Tp 3 NORTH LUCERA</text:span>, Dist 58.6 km, AvETE 14:22, AvETA 14:40. Utilizzando il pulsante <text:span text:style-name="T4">&gt;</text:span> il pilota scorre i waypoint successivi.</text:p>
      <text:p text:style-name="P2">Per ogni waypoint selezionato la mappa si centra sul punto e la linea di bearing mostra sempre la <text:span text:style-name="T4">direzione diretta dall'aereo al waypoint</text:span> — indipendentemente da quale sia il punto attivo di navigazione. I campi <text:span text:style-name="T4">Dist</text:span>, <text:span text:style-name="T4">AvETE</text:span> e <text:span text:style-name="T4">AvETA</text:span> vengono aggiornati in tempo reale in base alla posizione corrente verso il waypoint visualizzato: il pilota sa immediatamente distanza, tempo stimato e orario di arrivo senza dover confermare nulla.</text:p>
      <text:p text:style-name="P2">Avanzando fino a <text:span text:style-name="T4">Tp 4 SAN VITO CHIETINO</text:span> (Dist 164.3 km, AvETE 40:19, AvETA 15:06) compare il pulsante <text:span text:style-name="T4">Direct To</text:span>. Premendo <text:span text:style-name="T4">&gt;</text:span> ancora si arriva a <text:span text:style-name="T4">Tp 5 ROSETO DEGLI ABRUZZI</text:span> (Dist 218.7 km, AvETE 53:40, AvETA 15:20). I pulsanti <text:span text:style-name="T4">&lt;</text:span> e <text:span text:style-name="T4">&gt;</text:span> permettono di scorrere liberamente tra tutti i waypoint della task.</text:p>
      <text:p text:style-name="P7"><draw:frame draw:style-name="fr2" draw:name="Picture 17" text:anchor-type="as-char" svg:width="8.382cm" svg:height="5.793cm" draw:z-index="11"><draw:image xlink:href="Pictures/10000001000003260000022DF457D93D.png" xlink:type="simple" xlink:show="embed" xlink:actuate="onLoad" draw:mime-type="image/png"/></draw:frame></text:p>
      <text:p text:style-name="P7"><draw:frame draw:style-name="fr2" draw:name="Picture 18" text:anchor-type="as-char" svg:width="8.382cm" svg:height="5.793cm" draw:z-index="12"><draw:image xlink:href="Pictures/10000001000003260000022DC5757E08.png" xlink:type="simple" xlink:show="embed" xlink:actuate="onLoad" draw:mime-type="image/png"/></draw:frame></text:p>
      <text:h text:style-name="P3" text:outline-level="2">Conferma con il countdown</text:h>
      <text:p text:style-name="P2"><text:span text:style-name="T2">Premendo </text:span><text:span text:style-name="T3">Direct To</text:span><text:span text:style-name="T2"> nel Target dialog appare il popup di conferma con countdown di </text:span><text:span text:style-name="T3">10 secondi</text:span><text:span text:style-name="T2">. Come per il Direct To off-task, il popup mostra </text:span><text:span text:style-name="T3">BRG, DIST, ETE e ETA</text:span><text:span text:style-name="T2"> calcolati dalla posizione corrente verso </text:span><text:soft-page-break/><text:span text:style-name="T2">il waypoint di task selezionato. Al termine la navigazione commuta immediatamente sul nuovo punto di task.</text:span></text:p>
      <text:p text:style-name="P4"><draw:frame draw:style-name="fr1" draw:name="Immagine14" text:anchor-type="as-char" svg:width="8.999cm" svg:height="6.2cm" draw:z-index="13"><draw:image xlink:href="Pictures/10000001000003260000022D821E3D37.png" xlink:type="simple" xlink:show="embed" xlink:actuate="onLoad" draw:mime-type="image/png"/></draw:frame></text:p>
      <text:h text:style-name="P3" text:outline-level="2">Direct To confermato: navigazione verso ROSETO</text:h>
      <text:p text:style-name="P2">La navigazione commuta su <text:span text:style-name="T1">ROSETO DEGLI ABRUZZI</text:span> (T&gt;ROSETO DE..., 182 km, Brg 321°, NxAvETE 45:46). La linea di bearing si orienta direttamente verso ROSETO ignorando i punti intermedi. Riaprendo la finestra Target il titolo rimane <text:span text:style-name="T1">"Target"</text:span> — non "Direct To: ..." come nel caso off-task — perché il punto è già nella task e ActiveTaskPoint è semplicemente avanzato a Tp 5 (Dist 181.0 km, AvETE 45:27, AvETA 08:02).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5"><draw:frame draw:style-name="fr1" draw:name="Immagine15" text:anchor-type="as-char" svg:width="7.2cm" svg:height="5.001cm" draw:z-index="14"><draw:image xlink:href="Pictures/1000000100000154000000EC135CAA1B.png" xlink:type="simple" xlink:show="embed" xlink:actuate="onLoad" draw:mime-type="image/png"/><svg:desc>T&gt;ROSETO mappa</svg:desc></draw:frame></text:p>
          </table:table-cell>
          <table:table-cell table:style-name="Tabella3.A1" office:value-type="string">
            <text:p text:style-name="P6"><draw:frame draw:style-name="fr1" draw:name="Immagine16" text:anchor-type="as-char" svg:width="7.2cm" svg:height="5.001cm" draw:z-index="15"><draw:image xlink:href="Pictures/1000000100000154000000ECF03FEA26.png" xlink:type="simple" xlink:show="embed" xlink:actuate="onLoad" draw:mime-type="image/png"/><svg:desc>Finestra Target Tp5</svg:desc></draw:frame></text:p>
          </table:table-cell>
        </table:table-row>
      </table:table>
      <text:h text:style-name="P3" text:outline-level="2">Nota bene — Effetti sul driver Generic Autopilot di LK8000</text:h>
      <text:p text:style-name="P2">Le manovre Direct To descritte in questo capitolo hanno effetti diretti sul driver <text:span text:style-name="T1">Generic Autopilot</text:span> di LK8000, che genera i messaggi <text:span text:style-name="T1">NMEA $GPRMB</text:span> trasmessi all'autopilota collegato.</text:p>
      <text:p text:style-name="P2"><text:span text:style-name="T4">NB:</text:span> Il pilota non deve modificare alcuna impostazione sull'autopilota durante queste manovre. LK8000 aggiorna automaticamente destinazione e XTE al momento del Direct To e al momento della ripresa della task.</text:p>
      <text:p text:style-name="P2"><text:span text:style-name="T1">Task normale:</text:span> il $GPRMB contiene come destinazione il prossimo waypoint di task; l'XTE è calcolato rispetto alla rotta della leg attiva.</text:p>
      <text:p text:style-name="P2"><text:span text:style-name="T1">Direct To verso fix off-task:</text:span> non appena il countdown conferma il Direct To, il $GPRMB commuta immediatamente sul fix come destinazione. L'XTE è calcolato rispetto alla rotta diretta dalla posizione di attivazione al fix.</text:p>
      <text:p text:style-name="P2"><text:span text:style-name="T1">Ripresa automatica della task:</text:span> al raggiungimento del fix il $GPRMB commuta sul nuovo prossimo <text:soft-page-break/>waypoint di task. L'XTE viene calcolato dalla posizione del fix verso il nuovo target, garantendo continuità della guida laterale senza discontinuità.</text:p>
      <text:p text:style-name="P2"><text:span text:style-name="T1">Direct To verso punto di task:</text:span> il sistema attiva immediatamente una leg DIRECT dalla posizione di conferma al fix selezionato; il $GPRMB trasmette XTE e bearing per intercettare e mantenere la rotta diretta, minimizzando la distanza residua.</text:p>
      <text:p text:style-name="P8" loext:marker-style-name="T5"><text:span text:style-name="T5">LK8000 Tactical Flight Computer — Funzione Direct To GA · Bozza IT · Giugno 2026 </text:span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 style:font-family-generic="roman" style:font-pitch="variable"/>
    <style:font-face style:name="Arial1" svg:font-family="Arial, sans-serif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fals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2cm" style:writing-mode="page"/>
      <style:text-properties style:use-window-font-color="true" loext:opacity="0%" style:font-name="Liberation Serif" fo:font-size="12pt" fo:language="it" fo:country="IT" style:letter-kerning="fals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.499cm" fo:margin-right="2.499cm" fo:margin-top="2cm" fo:margin-bottom="2cm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fo:color="#000000" loext:opacity="100%" style:font-name="Arial" fo:font-family="Arial, sans-serif" style:font-family-generic="roman" style:font-pitch="variable" fo:font-size="11pt" fo:language="it" fo:country="IT" style:font-name-asian="Arial1" style:font-family-asian="Arial, sans-serif" style:font-family-generic-asian="system" style:font-pitch-asian="variable" style:font-size-asian="11pt" style:language-asian="zh" style:country-asian="CN" style:font-name-complex="Arial1" style:font-family-complex="Arial, sans-serif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76cm" fo:margin-right="0.176cm" fo:margin-top="0.176cm" fo:margin-bottom="0.176cm" style:contextual-spacing="false" fo:line-height="145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olo" style:next-style-name="Text_20_body" style:class="chapter">
      <style:paragraph-properties fo:margin-top="0.423cm" fo:margin-bottom="0.28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itolo" style:next-style-name="Text_20_body" style:default-outline-level="2" style:list-style-name="" style:class="chapter">
      <style:paragraph-properties fo:margin-left="2.499cm" fo:margin-top="0.706cm" fo:margin-bottom="0.212cm" style:contextual-spacing="false"/>
      <style:text-properties style:font-name="Liberation Serif" fo:font-family="'Liberation Serif'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nea_20_orizzontale" style:display-name="Linea orizzontale" style:family="paragraph" style:parent-style-name="Standard" style:next-style-name="Text_20_body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/>
      <style:text-properties fo:font-size="6pt" style:font-size-asian="6pt"/>
    </style:style>
    <style:style style:name="Sender" style:family="paragraph" style:parent-style-name="Standard" style:class="extra">
      <style:text-properties fo:font-style="italic" style:font-style-asian="italic"/>
    </style:style>
    <style:style style:name="Contenuto_20_tabella" style:display-name="Contenuto tabella" style:family="paragraph" style:parent-style-name="Text_20_body"/>
    <style:style style:name="Titolo" style:family="paragraph" style:parent-style-name="Standard" style:next-style-name="Text_20_body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Indice" style:family="paragraph" style:parent-style-name="Standard">
      <style:paragraph-properties text:number-lines="false" text:line-number="0"/>
    </style:style>
    <style:style style:name="Titolo_20_tabella" style:display-name="Titolo tabella" style:family="paragraph" style:parent-style-name="Contenuto_20_tabel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Caratteri_20_nota_20_di_20_chiusura" style:display-name="Caratteri nota di chiusura" style:family="text"/>
    <style:style style:name="Caratteri_20_nota_20_a_20_piè_20_di_20_pagina" style:display-name="Caratteri nota a piè di pagina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it-IT</dc:language>
    <meta:editing-cycles>1</meta:editing-cycles>
    <meta:editing-duration>PT2M10S</meta:editing-duration>
    <meta:generator>LibreOffice/25.2.3.2$Linux_X86_64 LibreOffice_project/520$Build-2</meta:generator>
    <dc:date>2026-06-07T15:39:20.634349516</dc:date>
    <meta:document-statistic meta:table-count="3" meta:image-count="16" meta:object-count="0" meta:page-count="7" meta:paragraph-count="56" meta:word-count="1162" meta:character-count="7248" meta:non-whitespace-character-count="6116"/>
    <meta:user-defined meta:name="AppVersion">15.0000</meta:user-defined>
  </office:meta>
</office:document-meta>
</file>